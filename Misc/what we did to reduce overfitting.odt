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ata Preprocessing:</text:p>
      <text:p text:style-name="P1">Data Loading and Feature Selection: We loaded your dataset and selected the relevant features and target variable (fraud).</text:p>
      <text:p text:style-name="P1"/>
      <text:p text:style-name="P1">Handling Missing Values: We handled any missing data by using median imputation for numerical features.</text:p>
      <text:p text:style-name="P1"/>
      <text:p text:style-name="P1">Class Imbalance: We balanced the class distribution by downsampling the majority class (0) to match the number of records in the minority class (1), while maintaining the overall distribution of classes.</text:p>
      <text:p text:style-name="P1"/>
      <text:p text:style-name="P1">2. Model Selection and Configuration:</text:p>
      <text:p text:style-name="P1">Random Forest Classifier: Random Forest was chosen as the model because of its robustness and ability to handle imbalanced datasets.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Hyperparameter Tuning:</text:p>
      <text:p text:style-name="P1">We used shallow trees (max_depth=3) to reduce overfitting.</text:p>
      <text:p text:style-name="P1"/>
      <text:p text:style-name="P1"/>
      <text:p text:style-name="P1"/>
      <text:p text:style-name="P1"/>
      <text:p text:style-name="P1">We reduced the number of trees (n_estimators=20) to prevent the model from becoming too complex.</text:p>
      <text:p text:style-name="P1">We adjusted min_samples_split and min_samples_leaf to higher values to ensure the trees are not too finely split and to avoid overfitting.</text:p>
      <text:p text:style-name="P1"/>
      <text:p text:style-name="P1">3. Cross-Validation:</text:p>
      <text:p text:style-name="P1">We used Stratified K-Fold Cross-Validation to ensure the class distribution is preserved in each fold, which helped us assess model performance more reliably across different subsets of the data.</text:p>
      <text:p text:style-name="P1">We computed cross-validated F1 scores to evaluate the model's performance on multiple splits.</text:p>
      <text:p text:style-name="P1"/>
      <text:p text:style-name="P1"><text:soft-page-break/>4. Evaluation:</text:p>
      <text:p text:style-name="P1">After training the model, we used various evaluation metrics:</text:p>
      <text:p text:style-name="P1">Accuracy: To measure the overall correctness of the model.</text:p>
      <text:p text:style-name="P1">Precision, Recall, F1-Score: To evaluate how well the model performs in identifying fraud cases (class 1) and non-fraud cases (class 0).</text:p>
      <text:p text:style-name="P1"/>
      <text:p text:style-name="P1"/>
      <text:p text:style-name="P1"/>
      <text:p text:style-name="P1"/>
      <text:p text:style-name="P1"/>
      <text:p text:style-name="P1">ROC-AUC: To assess the model's performance across all classification thresholds.</text:p>
      <text:p text:style-name="P1">We then displayed the confusion matrix to visualize the model's predictions (true positives, false positives, true negatives, and false negatives).</text:p>
      <text:p text:style-name="P1"/>
      <text:p text:style-name="P1">5. Adjusting Dataset Size:</text:p>
      <text:p text:style-name="P1">We further reduced the dataset size by downsampling, selecting a reasonable number of samples from both classes (around 3000 from class 0 and 2000 from class 1).</text:p>
      <text:p text:style-name="P1"><text:soft-page-break/>This helped balance the dataset while ensuring that the model had enough data to learn meaningful patterns.</text:p>
      <text:p text:style-name="P1"/>
      <text:p text:style-name="P1"/>
      <text:p text:style-name="P1">6. Final Model:</text:p>
      <text:p text:style-name="P1">After balancing the dataset and tuning the hyperparameters, we trained the model on the final dataset and achieved the desired balance between performance metrics, with a mean F1 score and recall in the range of 0.7-0.8.</text:p>
      <text:p text:style-name="P1"/>
      <text:p text:style-name="P1"/>
      <text:p text:style-name="P1">Outcome:</text:p>
      <text:p text:style-name="P1">The model now performs effectively with an acceptable balance of precision, recall, accuracy, and F1-score, without overfitting the data.</text:p>
      <text:p text:style-name="P1">The ROC-AUC score remains high, indicating that the model is still good at distinguishing between fraudulent and non-fraudulent transactio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00:18:06.770188419</meta:creation-date>
    <meta:generator>LibreOffice/24.2.7.2$Linux_X86_64 LibreOffice_project/420$Build-2</meta:generator>
    <dc:date>2024-12-15T00:19:41.624627207</dc:date>
    <meta:editing-duration>PT1M35S</meta:editing-duration>
    <meta:editing-cycles>1</meta:editing-cycles>
    <meta:document-statistic meta:table-count="0" meta:image-count="0" meta:object-count="0" meta:page-count="4" meta:paragraph-count="27" meta:word-count="379" meta:character-count="2552" meta:non-whitespace-character-count="2200"/>
  </office:meta>
</office:document-meta>
</file>