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E000002BD8FDC0FF5.png" manifest:media-type="image/png"/>
  <manifest:file-entry manifest:full-path="Pictures/10000001000003BD000002BC56C14175.png" manifest:media-type="image/png"/>
  <manifest:file-entry manifest:full-path="Pictures/10000001000003A1000000E5692F10EA.png" manifest:media-type="image/png"/>
  <manifest:file-entry manifest:full-path="Pictures/10000001000003AA000000DE10A3A94E.png" manifest:media-type="image/png"/>
  <manifest:file-entry manifest:full-path="Pictures/10000001000003AA000000DEDE359E04.png" manifest:media-type="image/png"/>
  <manifest:file-entry manifest:full-path="Pictures/10000001000003F9000000FC37F3914E.png" manifest:media-type="image/png"/>
  <manifest:file-entry manifest:full-path="Pictures/10000000000003590000034441122E87.png" manifest:media-type="image/png"/>
  <manifest:file-entry manifest:full-path="Pictures/100000010000057900000263BF553B56.png" manifest:media-type="image/png"/>
  <manifest:file-entry manifest:full-path="Pictures/1000000100000397000000681FD99376.png" manifest:media-type="image/png"/>
  <manifest:file-entry manifest:full-path="Pictures/10000001000005FA0000015126981F39.png" manifest:media-type="image/png"/>
  <manifest:file-entry manifest:full-path="Pictures/100000000000022A000001A020FEBBA5.png" manifest:media-type="image/png"/>
  <manifest:file-entry manifest:full-path="Pictures/1000000000000235000001A02B81E3C8.png" manifest:media-type="image/png"/>
  <manifest:file-entry manifest:full-path="Pictures/1000000000000244000001C798ACCA14.png" manifest:media-type="image/png"/>
  <manifest:file-entry manifest:full-path="Pictures/1000000000000237000001A06BB71513.png" manifest:media-type="image/png"/>
  <manifest:file-entry manifest:full-path="Pictures/100000010000062400000323D48A1899.png" manifest:media-type="image/png"/>
  <manifest:file-entry manifest:full-path="Pictures/100000010000036B0000013E7B133AEE.png" manifest:media-type="image/png"/>
  <manifest:file-entry manifest:full-path="Pictures/1000000100000271000000D817BD3EBE.png" manifest:media-type="image/png"/>
  <manifest:file-entry manifest:full-path="Pictures/10000001000002920000009DE1F41604.png" manifest:media-type="image/png"/>
  <manifest:file-entry manifest:full-path="Pictures/10000001000003770000012D113789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fo:font-size="18pt" officeooo:rsid="0002f0c9" officeooo:paragraph-rsid="0002f0c9" style:font-size-asian="15.75pt" style:font-size-complex="18pt"/>
    </style:style>
    <style:style style:name="P3" style:family="paragraph" style:parent-style-name="Standard">
      <style:text-properties style:font-name="Liberation Sans" fo:font-size="18pt" officeooo:rsid="0004ddb0" officeooo:paragraph-rsid="0004ddb0" style:font-size-asian="15.75pt" style:font-size-complex="18pt"/>
    </style:style>
    <style:style style:name="P4" style:family="paragraph" style:parent-style-name="Standard">
      <style:text-properties style:font-name="Liberation Sans" fo:font-size="18pt" officeooo:rsid="0004ddb0" officeooo:paragraph-rsid="0004ddb0" style:font-size-asian="18pt" style:font-size-complex="18pt"/>
    </style:style>
    <style:style style:name="P5" style:family="paragraph" style:parent-style-name="Standard">
      <style:text-properties style:font-name="Liberation Sans" fo:font-size="18pt" officeooo:rsid="0004ddb0" officeooo:paragraph-rsid="000d1817" style:font-size-asian="18pt" style:font-size-complex="18pt"/>
    </style:style>
    <style:style style:name="P6" style:family="paragraph" style:parent-style-name="Standard">
      <style:text-properties style:font-name="Liberation Sans" fo:font-size="18pt" officeooo:rsid="000d1817" officeooo:paragraph-rsid="000d1817" style:font-size-asian="18pt" style:font-size-complex="18pt"/>
    </style:style>
    <style:style style:name="P7" style:family="paragraph" style:parent-style-name="Standard">
      <style:text-properties style:font-name="Liberation Sans" fo:font-size="18pt" style:text-underline-style="solid" style:text-underline-width="auto" style:text-underline-color="font-color" officeooo:rsid="0004ddb0" officeooo:paragraph-rsid="0004ddb0" style:font-size-asian="18pt" style:font-size-complex="18pt"/>
    </style:style>
    <style:style style:name="P8" style:family="paragraph" style:parent-style-name="Standard">
      <style:text-properties style:font-name="Liberation Sans" fo:font-size="18pt" style:text-underline-style="none" officeooo:rsid="0004ddb0" officeooo:paragraph-rsid="0014bcac" style:font-size-asian="18pt" style:font-size-complex="18pt"/>
    </style:style>
    <style:style style:name="P9" style:family="paragraph" style:parent-style-name="Standard">
      <style:text-properties style:font-name="Liberation Sans" fo:font-size="20pt" officeooo:rsid="0004ddb0" officeooo:paragraph-rsid="000d1817" style:font-size-asian="20pt" style:font-size-complex="20pt"/>
    </style:style>
    <style:style style:name="P10" style:family="paragraph" style:parent-style-name="Standard">
      <style:text-properties style:font-name="Liberation Sans" fo:font-size="20pt" officeooo:rsid="0004ddb0" officeooo:paragraph-rsid="0004ddb0" style:font-size-asian="20pt" style:font-size-complex="20pt"/>
    </style:style>
    <style:style style:name="P11" style:family="paragraph" style:parent-style-name="Standard">
      <style:text-properties style:font-name="Liberation Sans" fo:font-size="20pt" officeooo:paragraph-rsid="0014bcac" style:font-size-asian="20pt" style:font-size-complex="20pt"/>
    </style:style>
    <style:style style:name="P12" style:family="paragraph" style:parent-style-name="Standard">
      <style:text-properties style:font-name="Liberation Sans" fo:font-size="20pt" style:text-underline-style="none" officeooo:paragraph-rsid="0014bcac" style:font-size-asian="20pt" style:font-size-complex="20pt"/>
    </style:style>
    <style:style style:name="P13" style:family="paragraph" style:parent-style-name="Standard">
      <style:text-properties style:font-name="Liberation Serif" fo:font-size="18pt" officeooo:rsid="0002f0c9" officeooo:paragraph-rsid="0002f0c9" style:font-size-asian="15.75pt" style:font-size-complex="18pt"/>
    </style:style>
    <style:style style:name="P14" style:family="paragraph" style:parent-style-name="Standard">
      <style:text-properties style:font-name="Liberation Serif" fo:font-size="18pt" officeooo:rsid="0002f0c9" officeooo:paragraph-rsid="0010efd1" style:font-size-asian="15.75pt" style:font-size-complex="18pt"/>
    </style:style>
    <style:style style:name="P15" style:family="paragraph" style:parent-style-name="Standard">
      <style:text-properties style:font-name="Liberation Serif" fo:font-size="18pt" officeooo:rsid="0004ddb0" officeooo:paragraph-rsid="0004ddb0" style:font-size-asian="15.75pt" style:font-size-complex="18pt"/>
    </style:style>
    <style:style style:name="P16" style:family="paragraph" style:parent-style-name="Standard">
      <style:text-properties officeooo:paragraph-rsid="0002f0c9"/>
    </style:style>
    <style:style style:name="P17" style:family="paragraph" style:parent-style-name="Text_20_body">
      <style:text-properties officeooo:paragraph-rsid="0004ddb0"/>
    </style:style>
    <style:style style:name="P18" style:family="paragraph" style:parent-style-name="Standard" style:list-style-name="L1">
      <style:text-properties style:font-name="Liberation Sans" fo:font-size="18pt" officeooo:rsid="0004ddb0" officeooo:paragraph-rsid="0004ddb0" style:font-size-asian="18pt" style:font-size-complex="18pt"/>
    </style:style>
    <style:style style:name="P19" style:family="paragraph" style:parent-style-name="Standard" style:list-style-name="L2">
      <style:text-properties style:font-name="Liberation Sans" fo:font-size="18pt" officeooo:rsid="0004ddb0" officeooo:paragraph-rsid="0004ddb0" style:font-size-asian="18pt" style:font-size-complex="18pt"/>
    </style:style>
    <style:style style:name="P20" style:family="paragraph" style:parent-style-name="Standard" style:list-style-name="L2">
      <style:text-properties style:font-name="Liberation Sans" fo:font-size="20pt" officeooo:rsid="0004ddb0" officeooo:paragraph-rsid="0004ddb0" style:font-size-asian="20pt" style:font-size-complex="20pt"/>
    </style:style>
    <style:style style:name="T1" style:family="text">
      <style:text-properties style:font-name="Liberation Sans" fo:font-size="18pt" fo:font-weight="normal" officeooo:rsid="00051e6c" style:font-size-asian="18pt" style:font-weight-asian="normal" style:font-size-complex="18pt" style:font-weight-complex="normal"/>
    </style:style>
    <style:style style:name="T2" style:family="text">
      <style:text-properties style:font-name="Liberation Sans"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4ddb0"/>
    </style:style>
    <style:style style:name="T6" style:family="text">
      <style:text-properties officeooo:rsid="000c353d"/>
    </style:style>
    <style:style style:name="T7" style:family="text">
      <style:text-properties officeooo:rsid="000d1817"/>
    </style:style>
    <style:style style:name="T8" style:family="text">
      <style:text-properties style:text-underline-style="none" officeooo:rsid="000d1817"/>
    </style:style>
    <style:style style:name="T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0" style:family="text">
      <style:text-properties officeooo:rsid="0004dd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">1) Dataset Preparation</text:p>
      <text:p text:style-name="P2"/>
      <text:p text:style-name="P2">1.1)Loading the dataset:</text:p>
      <text:p text:style-name="P2"/>
      <text:p text:style-name="P2"/>
      <text:p text:style-name="P2"><draw:frame draw:style-name="fr1" draw:name="Image1 Copy 1" text:anchor-type="char" svg:x="-1.639cm" svg:y="0.57cm" svg:width="21.228cm" svg:height="16.381cm" draw:z-index="17"><draw:image xlink:href="Pictures/100000010000057900000263BF553B56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>1.2) Handling Missing Values:</text:p>
      <text:p text:style-name="Standard"/>
      <text:p text:style-name="Standard"><draw:frame draw:style-name="fr1" draw:name="Image2" text:anchor-type="char" svg:x="-1.762cm" svg:y="0.247cm" svg:width="20.533cm" svg:height="13.839cm" draw:z-index="6"><draw:image xlink:href="Pictures/100000010000062400000323D48A189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oft-page-break/>2) EDA :</text:p>
      <text:p text:style-name="P13">2.1) Understand Data Distribution</text:p>
      <text:p text:style-name="P13"><draw:frame draw:style-name="fr2" draw:name="Image3" text:anchor-type="char" svg:width="17.59cm" svg:height="4.357cm" draw:z-index="8"><draw:image xlink:href="Pictures/10000001000003F9000000FC37F3914E.png" xlink:type="simple" xlink:show="embed" xlink:actuate="onLoad" draw:mime-type="image/png"/></draw:frame><draw:frame draw:style-name="fr1" draw:name="Image19" text:anchor-type="char" svg:x="-0.628cm" svg:y="6.257cm" svg:width="17.59cm" svg:height="17.157cm" draw:z-index="7"><draw:image xlink:href="Pictures/10000000000003590000034441122E87.png" xlink:type="simple" xlink:show="embed" xlink:actuate="onLoad" draw:mime-type="image/png"/></draw:frame></text:p>
      <text:p text:style-name="P13"/>
      <text:p text:style-name="P14"><text:soft-page-break/>2.2) Class balance</text:p>
      <text:p text:style-name="P14"/>
      <text:p text:style-name="P13"><draw:frame draw:style-name="fr4" draw:name="Image4" text:anchor-type="char" svg:width="17.41cm" svg:height="4.154cm" draw:z-index="9"><draw:image xlink:href="Pictures/10000001000002920000009DE1F41604.png" xlink:type="simple" xlink:show="embed" xlink:actuate="onLoad" draw:mime-type="image/png"/></draw:frame></text:p>
      <text:p text:style-name="P13"/>
      <text:p text:style-name="P13"><draw:frame draw:style-name="fr1" draw:name="Image5" text:anchor-type="char" svg:x="0.545cm" svg:y="0.713cm" svg:width="15.346cm" svg:height="12.039cm" draw:z-index="10"><draw:image xlink:href="Pictures/1000000000000244000001C798ACCA1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><text:soft-page-break/>2.4) Outlier Detection</text:p>
      <text:p text:style-name="P13"/>
      <text:p text:style-name="P13"/>
      <text:p text:style-name="P13"><draw:frame draw:style-name="fr1" draw:name="Image12" text:anchor-type="char" svg:x="-2cm" svg:y="0.522cm" svg:width="21.548cm" svg:height="3.865cm" draw:z-index="0"><draw:image xlink:href="Pictures/1000000100000397000000681FD99376.png" xlink:type="simple" xlink:show="embed" xlink:actuate="onLoad" draw:mime-type="image/png"/></draw:frame></text:p>
      <text:p text:style-name="P13"><draw:frame draw:style-name="fr3" draw:name="Image6" text:anchor-type="char" svg:width="14.658cm" svg:height="11.007cm" draw:z-index="11"><draw:image xlink:href="Pictures/100000000000022A000001A020FEBBA5.png" xlink:type="simple" xlink:show="embed" xlink:actuate="onLoad" draw:mime-type="image/png"/></draw:frame></text:p>
      <text:p text:style-name="P13"/>
      <text:p text:style-name="P13"/>
      <text:p text:style-name="P13"><text:soft-page-break/></text:p>
      <text:p text:style-name="P13"/>
      <text:p text:style-name="P13"><draw:frame draw:style-name="fr1" draw:name="Image7" text:anchor-type="char" svg:x="1.843cm" svg:y="-0.272cm" svg:width="14.012cm" svg:height="10.28cm" draw:z-index="12"><draw:image xlink:href="Pictures/1000000000000237000001A06BB71513.png" xlink:type="simple" xlink:show="embed" xlink:actuate="onLoad" draw:mime-type="image/png"/></draw:frame></text:p>
      <text:p text:style-name="P13"/>
      <text:p text:style-name="P13"/>
      <text:p text:style-name="P13"/>
      <text:p text:style-name="P13"><draw:frame draw:style-name="fr3" draw:name="Image8" text:anchor-type="char" svg:width="14.949cm" svg:height="11.007cm" draw:z-index="13"><draw:image xlink:href="Pictures/1000000000000235000001A02B81E3C8.png" xlink:type="simple" xlink:show="embed" xlink:actuate="onLoad" draw:mime-type="image/png"/></draw:frame><text:soft-page-break/></text:p>
      <text:p text:style-name="P13"/>
      <text:p text:style-name="P13">3) Train-test Split</text:p>
      <text:p text:style-name="P13">3.1) <text:s/>Encode Categorical Data</text:p>
      <text:p text:style-name="P13"><draw:frame draw:style-name="fr1" draw:name="Image9" text:anchor-type="char" svg:x="0.766cm" svg:y="0.37cm" svg:width="16.536cm" svg:height="5.715cm" draw:z-index="4"><draw:image xlink:href="Pictures/1000000100000271000000D817BD3EBE.png" xlink:type="simple" xlink:show="embed" xlink:actuate="onLoad" draw:mime-type="image/png"/></draw:frame></text:p>
      <text:p text:style-name="P13"><text:soft-page-break/>3.2) Split Data</text:p>
      <text:p text:style-name="P13"/>
      <text:p text:style-name="P13"><draw:frame draw:style-name="fr2" draw:name="Image10" text:anchor-type="char" svg:width="17.59cm" svg:height="6.392cm" draw:z-index="14"><draw:image xlink:href="Pictures/100000010000036B0000013E7B133AE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) Applying ML Algorithms:</text:p>
      <text:p text:style-name="P3">4.1) Logistic Regression</text:p>
      <text:p text:style-name="P15"><draw:frame draw:style-name="fr1" draw:name="Image11" text:anchor-type="char" svg:x="-1cm" svg:y="0.646cm" svg:width="19.59cm" svg:height="6.646cm" draw:z-index="15"><draw:image xlink:href="Pictures/10000001000003770000012D113789A6.png" xlink:type="simple" xlink:show="embed" xlink:actuate="onLoad" draw:mime-type="image/png"/></draw:frame></text:p>
      <text:p text:style-name="P3"/>
      <text:p text:style-name="P3"/>
      <text:p text:style-name="P3">4.<text:span text:style-name="T6">2</text:span>)Decision Tree</text:p>
      <text:p text:style-name="P3"><draw:frame draw:style-name="fr1" draw:name="Image16" text:anchor-type="char" svg:x="-2.043cm" svg:y="0.661cm" svg:width="21.34cm" svg:height="4.995cm" draw:z-index="1"><draw:image xlink:href="Pictures/10000001000003AA000000DEDE359E0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4.3) Random Forest</text:p>
      <text:p text:style-name="P15"/>
      <text:p text:style-name="P15"><draw:frame draw:style-name="fr1" draw:name="Image17" text:anchor-type="char" svg:x="-1.598cm" svg:y="0.494cm" svg:width="20.777cm" svg:height="6.465cm" draw:z-index="2"><draw:image xlink:href="Pictures/10000001000003AA000000DE10A3A94E.png" xlink:type="simple" xlink:show="embed" xlink:actuate="onLoad" draw:mime-type="image/png"/></draw:frame></text:p>
      <text:p text:style-name="P15"/>
      <text:p text:style-name="P15">4.4) Gradient Boosting</text:p>
      <text:p text:style-name="P16"><draw:frame draw:style-name="fr1" draw:name="Image18" text:anchor-type="char" svg:x="-1.429cm" svg:y="0.436cm" svg:width="20.447cm" svg:height="5.263cm" draw:z-index="3"><draw:image xlink:href="Pictures/10000001000003A1000000E5692F10E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5) Evaluation Metrics</text:p>
      <text:p text:style-name="P10"/>
      <text:p text:style-name="P10">5.1) Evaluating Models</text:p>
      <text:p text:style-name="P3"/>
      <text:p text:style-name="P3"><draw:frame draw:style-name="fr1" draw:name="Image13" text:anchor-type="char" svg:x="-1.208cm" svg:y="0.116cm" svg:width="20.452cm" svg:height="17.233cm" draw:z-index="16"><draw:image xlink:href="Pictures/10000001000003BD000002BC56C14175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3"/>
      <text:p text:style-name="P3">5.2) Plotting ROC Curves</text:p>
      <text:p text:style-name="Standard"/>
      <text:p text:style-name="Standard"><draw:frame draw:style-name="fr1" draw:name="Image14" text:anchor-type="char" svg:x="-1.61cm" svg:y="0.005cm" svg:width="20.59cm" svg:height="5.225cm" draw:z-index="5"><draw:image xlink:href="Pictures/10000001000005FA0000015126981F39.png" xlink:type="simple" xlink:show="embed" xlink:actuate="onLoad" draw:mime-type="image/png"/></draw:frame></text:p>
      <text:p text:style-name="P1"/>
      <text:p text:style-name="P1"><draw:frame draw:style-name="fr1" draw:name="Image15" text:anchor-type="char" svg:x="-1.152cm" svg:y="0.36cm" svg:width="17.59cm" svg:height="14.573cm" draw:z-index="18"><draw:image xlink:href="Pictures/100000000000034E000002BD8FDC0FF5.png" xlink:type="simple" xlink:show="embed" xlink:actuate="onLoad" draw:mime-type="image/png"/></draw:frame></text:p>
      <text:p text:style-name="P11"><text:soft-page-break/><text:span text:style-name="T10">6) </text:span><text:span text:style-name="T5">Comparing Results</text:span></text:p>
      <text:p text:style-name="P11"><text:span text:style-name="T5"/></text:p>
      <text:p text:style-name="P12"><text:span text:style-name="T10"><text:s text:c="6"/></text:span><text:span text:style-name="T5">Evaluation Metrics</text:span></text:p>
      <text:p text:style-name="P8"><text:s text:c="6"/></text:p>
      <text:p text:style-name="P8"><text:s text:c="4"/>• Accuracy: Overall correctness of predictions.</text:p>
      <text:p text:style-name="P8"><text:s text:c="4"/>• Precision: Proportion of positive predictions that are actually positive.</text:p>
      <text:p text:style-name="P8"><text:s text:c="4"/>• Recall: Proportion of actual positive cases correctly identified.</text:p>
      <text:p text:style-name="P8"><text:s text:c="4"/>• F1-Score: Harmonic mean of precision and recall,</text:p>
      <text:p text:style-name="P8"><text:s text:c="6"/>balancing both. </text:p>
      <text:p text:style-name="P8"><text:s text:c="4"/>• AUC-ROC: Area Under the Receiver Operating Characteristic curve, measuring a model's ability to distinguish between positive and negative classes. <text:line-break/></text:p>
      <text:p text:style-name="P5"><text:span text:style-name="T7">6.1)a) </text:span><text:span text:style-name="T4">Logistic Regression</text:span></text:p>
      <text:p text:style-name="P4"/>
      <text:p text:style-name="P4">Accuracy: 0.796</text:p>
      <text:p text:style-name="P4">Precision: 0.628</text:p>
      <text:p text:style-name="P4">Recall: 0.718</text:p>
      <text:p text:style-name="P4">F1 Score: 0.690</text:p>
      <text:p text:style-name="P4">AUC-ROC: 0.690</text:p>
      <text:p text:style-name="P4"/>
      <text:p text:style-name="P4"><text:span text:style-name="T7">b)</text:span><text:span text:style-name="T4">Decision Tree</text:span></text:p>
      <text:p text:style-name="P4"/>
      <text:p text:style-name="P4">Accuracy: 0.711</text:p>
      <text:p text:style-name="P4">Precision: 0.381</text:p>
      <text:p text:style-name="P4">Recall: 0.405</text:p>
      <text:p text:style-name="P4">F1 Score: 0.405</text:p>
      <text:p text:style-name="P4">AUC-ROC: 0.605</text:p>
      <text:p text:style-name="P4"/>
      <text:p text:style-name="P4"/>
      <text:p text:style-name="P4"><text:soft-page-break/><text:span text:style-name="T7">c)</text:span><text:span text:style-name="T4">Random Forest</text:span></text:p>
      <text:p text:style-name="P4"/>
      <text:p text:style-name="P4">Accuracy: 0.816</text:p>
      <text:p text:style-name="P4">Precision: 0.645</text:p>
      <text:p text:style-name="P4">Recall: 0.364</text:p>
      <text:p text:style-name="P4">F1 Score: 0.466</text:p>
      <text:p text:style-name="P4">AUC-ROC: 0.739</text:p>
      <text:p text:style-name="P4"/>
      <text:p text:style-name="P7"><text:span text:style-name="T8">d)</text:span>Gradient Boosting</text:p>
      <text:p text:style-name="P4"/>
      <text:p text:style-name="P4">Accuracy: 0.826</text:p>
      <text:p text:style-name="P4">Precision: 0.700</text:p>
      <text:p text:style-name="P4">Recall: 0.362</text:p>
      <text:p text:style-name="P4">F1 Score: 0.477</text:p>
      <text:p text:style-name="P4">AUC-ROC: 0.768</text:p>
      <text:p text:style-name="P4"/>
      <text:p text:style-name="P5"><text:span text:style-name="T7">6</text:span>.<text:span text:style-name="T7">2)</text:span> <text:span text:style-name="T9">ROC Curves:</text:span></text:p>
      <text:list text:style-name="L1">
        <text:list-item>
          <text:p text:style-name="P18"><text:span text:style-name="T3">Gradient Boosting</text:span> has the highest AUC-ROC (0.77), indicating it performs better at distinguishing between the positive and negative classes.</text:p>
        </text:list-item>
      </text:list>
      <text:list text:style-name="L2">
        <text:list-item>
          <text:p text:style-name="P19">Random Forest follows with an AUC-ROC of 0.74, Logistic Regression is third with an AUC-ROC of 0.69,Decision Tree has the lowest AUC-ROC (0.61).</text:p>
          <text:p text:style-name="P20"/>
        </text:list-item>
      </text:list>
      <text:p text:style-name="P9"><text:span text:style-name="T7">6.</text:span>3<text:span text:style-name="T7">)</text:span> <text:span text:style-name="T4">Model Selection</text:span></text:p>
      <text:p text:style-name="P5"><text:span text:style-name="T4"/></text:p>
      <text:p text:style-name="P4"><text:span text:style-name="T4">Balanced Metric</text:span>: For a balance between precision and recall (measured by F1 Score),<text:span text:style-name="T4"> Logistic Regression </text:span>performs the best (F1 Score: 0.690).</text:p>
      <text:p text:style-name="P4"/>
      <text:p text:style-name="P4"><text:span text:style-name="T4">Ranking by AUC-ROC</text:span>: Gradient Boosting &gt; Random Forest &gt; Logistic Regression &gt; Decision Tree.</text:p>
      <text:p text:style-name="P6"><text:soft-page-break/></text:p>
      <text:p text:style-name="P6"/>
      <text:p text:style-name="P6">6.4) <text:span text:style-name="T9">Conclusion</text:span></text:p>
      <text:p text:style-name="P4"/>
      <text:p text:style-name="P4"><text:span text:style-name="T4">Gradient Boosting</text:span>: <text:span text:style-name="T3">Best choice</text:span> if you prioritize overall model performance based on AUC-ROC and precision.</text:p>
      <text:p text:style-name="P4"/>
      <text:p text:style-name="P4"><text:span text:style-name="T4">Logistic Regression</text:span>: Preferred for a simpler model with good balance across metrics, especially for recall-focused application<text:span text:style-name="T7">s.</text:span></text:p>
      <text:p text:style-name="P17"><text:span text:style-name="Strong_20_Emphasis"><text:span text:style-name="T1"><text:s text:c="4"/></text:span></text:span></text:p>
      <text:h text:style-name="Heading_20_3" text:outline-level="3"><text:span text:style-name="T2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3:11:18.295704071</meta:creation-date>
    <meta:generator>LibreOffice/24.2.6.2$Linux_X86_64 LibreOffice_project/420$Build-2</meta:generator>
    <dc:date>2024-12-12T00:20:45.536594669</dc:date>
    <meta:editing-duration>PT1H22M22S</meta:editing-duration>
    <meta:editing-cycles>21</meta:editing-cycles>
    <meta:document-statistic meta:table-count="0" meta:image-count="19" meta:object-count="0" meta:page-count="15" meta:paragraph-count="62" meta:word-count="290" meta:character-count="2049" meta:non-whitespace-character-count="1775"/>
  </office:meta>
</office:document-meta>
</file>