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A0000015126981F39.png" manifest:media-type="image/png"/>
  <manifest:file-entry manifest:full-path="Pictures/100000000000034E000002BDC41B61DC.png" manifest:media-type="image/png"/>
  <manifest:file-entry manifest:full-path="Pictures/10000001000003EB000002CD9BE8A8AD.png" manifest:media-type="image/png"/>
  <manifest:file-entry manifest:full-path="Pictures/10000001000003AA000000DE10A3A94E.png" manifest:media-type="image/png"/>
  <manifest:file-entry manifest:full-path="Pictures/10000001000003AA000000DEDE359E04.png" manifest:media-type="image/png"/>
  <manifest:file-entry manifest:full-path="Pictures/10000001000003A1000000E5692F10EA.png" manifest:media-type="image/png"/>
  <manifest:file-entry manifest:full-path="Pictures/100000010000055300000319FC258137.png" manifest:media-type="image/png"/>
  <manifest:file-entry manifest:full-path="Pictures/100000010000029A000000EF81334498.png" manifest:media-type="image/png"/>
  <manifest:file-entry manifest:full-path="Pictures/100000000000035000000344BB23318A.png" manifest:media-type="image/png"/>
  <manifest:file-entry manifest:full-path="Pictures/10000001000003BB0000016AFAB98722.png" manifest:media-type="image/png"/>
  <manifest:file-entry manifest:full-path="Pictures/1000000100000271000000D817BD3EBE.png" manifest:media-type="image/png"/>
  <manifest:file-entry manifest:full-path="Pictures/10000001000003BC000000F1188BC9DC.png" manifest:media-type="image/png"/>
  <manifest:file-entry manifest:full-path="Pictures/100000000000024D000001C79EE34DB1.png" manifest:media-type="image/png"/>
  <manifest:file-entry manifest:full-path="Pictures/1000000100000397000000681FD99376.png" manifest:media-type="image/png"/>
  <manifest:file-entry manifest:full-path="Pictures/10000001000003E0000002DDB4382900.png" manifest:media-type="image/png"/>
  <manifest:file-entry manifest:full-path="Pictures/1000000000000237000001A0E3493894.png" manifest:media-type="image/png"/>
  <manifest:file-entry manifest:full-path="Pictures/10000001000001540000003835098C21.png" manifest:media-type="image/png"/>
  <manifest:file-entry manifest:full-path="Pictures/100000000000024D000001B08FC290C7.png" manifest:media-type="image/png"/>
  <manifest:file-entry manifest:full-path="Pictures/100000010000032C000000EC188781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8pt" style:font-size-asian="15.75pt" style:font-size-complex="18pt"/>
    </style:style>
    <style:style style:name="P3" style:family="paragraph" style:parent-style-name="Standard">
      <style:text-properties style:font-name="Liberation Sans" fo:font-size="18pt" officeooo:rsid="0002f0c9" officeooo:paragraph-rsid="0002f0c9" style:font-size-asian="15.75pt" style:font-size-complex="18pt"/>
    </style:style>
    <style:style style:name="P4" style:family="paragraph" style:parent-style-name="Standard">
      <style:text-properties style:font-name="Liberation Sans" fo:font-size="18pt" officeooo:rsid="0004ddb0" officeooo:paragraph-rsid="0004ddb0" style:font-size-asian="15.75pt" style:font-size-complex="18pt"/>
    </style:style>
    <style:style style:name="P5" style:family="paragraph" style:parent-style-name="Standard">
      <style:text-properties style:font-name="Liberation Sans" fo:font-size="18pt" officeooo:rsid="0004ddb0" officeooo:paragraph-rsid="000d1817" style:font-size-asian="18pt" style:font-size-complex="18pt"/>
    </style:style>
    <style:style style:name="P6" style:family="paragraph" style:parent-style-name="Standard">
      <style:text-properties style:font-name="Liberation Sans" fo:font-size="18pt" officeooo:rsid="000d1817" officeooo:paragraph-rsid="000d1817" style:font-size-asian="18pt" style:font-size-complex="18pt"/>
    </style:style>
    <style:style style:name="P7" style:family="paragraph" style:parent-style-name="Standard">
      <style:text-properties style:font-name="Liberation Sans" fo:font-size="18pt" officeooo:rsid="000e5078" officeooo:paragraph-rsid="000e5078" style:font-size-asian="18pt" style:font-size-complex="18pt"/>
    </style:style>
    <style:style style:name="P8" style:family="paragraph" style:parent-style-name="Standard">
      <style:text-properties style:font-name="Liberation Sans" fo:font-size="18pt" style:text-underline-style="none" officeooo:rsid="0004ddb0" officeooo:paragraph-rsid="000d1817" style:font-size-asian="18pt" style:font-size-complex="18pt"/>
    </style:style>
    <style:style style:name="P9" style:family="paragraph" style:parent-style-name="Standard">
      <style:text-properties style:font-name="Liberation Sans" fo:font-size="18pt" style:text-underline-style="none" officeooo:rsid="000d1817" officeooo:paragraph-rsid="0004ddb0" style:font-size-asian="18pt" style:font-size-complex="18pt"/>
    </style:style>
    <style:style style:name="P10" style:family="paragraph" style:parent-style-name="Standard">
      <style:text-properties style:font-name="Liberation Sans" fo:font-size="20pt" officeooo:rsid="0004ddb0" officeooo:paragraph-rsid="0004ddb0" style:font-size-asian="20pt" style:font-size-complex="20pt"/>
    </style:style>
    <style:style style:name="P11" style:family="paragraph" style:parent-style-name="Standard">
      <style:text-properties style:font-name="Liberation Sans" fo:font-size="20pt" officeooo:rsid="0004ddb0" officeooo:paragraph-rsid="000d1817" style:font-size-asian="20pt" style:font-size-complex="20pt"/>
    </style:style>
    <style:style style:name="P12" style:family="paragraph" style:parent-style-name="Standard">
      <style:text-properties style:font-name="Liberation Sans" fo:font-size="20pt" officeooo:rsid="000e5078" officeooo:paragraph-rsid="000e5078" style:font-size-asian="20pt" style:font-size-complex="20pt"/>
    </style:style>
    <style:style style:name="P13" style:family="paragraph" style:parent-style-name="Standard">
      <style:text-properties style:font-name="Liberation Sans" fo:font-size="20pt" officeooo:paragraph-rsid="000e5078" style:font-size-asian="20pt" style:font-size-complex="20pt"/>
    </style:style>
    <style:style style:name="P14" style:family="paragraph" style:parent-style-name="Standard">
      <style:text-properties style:font-name="Liberation Sans" fo:font-size="20pt" officeooo:rsid="0012e238" officeooo:paragraph-rsid="0012e238" style:font-size-asian="20pt" style:font-size-complex="20pt"/>
    </style:style>
    <style:style style:name="P15" style:family="paragraph" style:parent-style-name="Standard">
      <style:text-properties style:font-name="Liberation Sans" fo:font-size="20pt" style:text-underline-style="solid" style:text-underline-width="auto" style:text-underline-color="font-color" officeooo:rsid="0004ddb0" officeooo:paragraph-rsid="000d1817" style:font-size-asian="20pt" style:font-size-complex="20pt"/>
    </style:style>
    <style:style style:name="P16" style:family="paragraph" style:parent-style-name="Standard">
      <style:text-properties style:font-name="Liberation Sans" fo:font-size="20pt" style:text-underline-style="none" officeooo:rsid="0004ddb0" officeooo:paragraph-rsid="000d1817" style:font-size-asian="20pt" style:font-size-complex="20pt"/>
    </style:style>
    <style:style style:name="P17" style:family="paragraph" style:parent-style-name="Standard">
      <style:text-properties style:font-name="Liberation Sans" fo:font-size="22pt" officeooo:rsid="000d1817" officeooo:paragraph-rsid="000d1817" style:font-size-asian="22pt" style:font-size-complex="22pt"/>
    </style:style>
    <style:style style:name="P18" style:family="paragraph" style:parent-style-name="Standard">
      <style:text-properties style:font-name="Liberation Sans" fo:font-size="22pt" officeooo:rsid="0004ddb0" officeooo:paragraph-rsid="0004ddb0" style:font-size-asian="22pt" style:font-size-complex="22pt"/>
    </style:style>
    <style:style style:name="P19" style:family="paragraph" style:parent-style-name="Standard">
      <style:text-properties style:font-name="Liberation Serif" fo:font-size="18pt" officeooo:rsid="0002f0c9" officeooo:paragraph-rsid="0002f0c9" style:font-size-asian="15.75pt" style:font-size-complex="18pt"/>
    </style:style>
    <style:style style:name="P20" style:family="paragraph" style:parent-style-name="Standard">
      <style:text-properties style:font-name="Liberation Serif" fo:font-size="18pt" officeooo:rsid="0004ddb0" officeooo:paragraph-rsid="0004ddb0" style:font-size-asian="15.75pt" style:font-size-complex="18pt"/>
    </style:style>
    <style:style style:name="P21" style:family="paragraph" style:parent-style-name="Standard">
      <style:text-properties officeooo:paragraph-rsid="0002f0c9"/>
    </style:style>
    <style:style style:name="P22" style:family="paragraph" style:parent-style-name="Standard">
      <style:text-properties officeooo:rsid="000723b7" officeooo:paragraph-rsid="000723b7"/>
    </style:style>
    <style:style style:name="P23" style:family="paragraph" style:parent-style-name="Standard">
      <style:text-properties officeooo:paragraph-rsid="000723b7"/>
    </style:style>
    <style:style style:name="P24" style:family="paragraph" style:parent-style-name="Standard" style:list-style-name="L1">
      <style:text-properties style:font-name="Liberation Sans" fo:font-size="21pt" officeooo:rsid="00126979" officeooo:paragraph-rsid="00126979" style:font-size-asian="21pt" style:font-size-complex="21pt"/>
    </style:style>
    <style:style style:name="P25" style:family="paragraph" style:parent-style-name="Standard" style:list-style-name="L1">
      <style:text-properties style:font-name="Liberation Sans" fo:font-size="20pt" officeooo:rsid="00126979" officeooo:paragraph-rsid="00126979" style:font-size-asian="20pt" style:font-size-complex="20pt"/>
    </style:style>
    <style:style style:name="P26" style:family="paragraph" style:parent-style-name="Standard" style:list-style-name="L1">
      <style:text-properties style:font-name="Liberation Sans" fo:font-size="20pt" officeooo:paragraph-rsid="00126979" style:font-size-asian="20pt" style:font-size-complex="20pt"/>
    </style:style>
    <style:style style:name="P27" style:family="paragraph" style:parent-style-name="Standard" style:list-style-name="L2">
      <style:text-properties style:font-name="Liberation Sans" fo:font-size="20pt" officeooo:paragraph-rsid="000e5078" style:font-size-asian="20pt" style:font-size-complex="20pt"/>
    </style:style>
    <style:style style:name="P28" style:family="paragraph" style:parent-style-name="Standard" style:list-style-name="L6">
      <style:text-properties style:font-name="Liberation Sans" fo:font-size="20pt" officeooo:rsid="0004ddb0" officeooo:paragraph-rsid="000d1817" style:font-size-asian="20pt" style:font-size-complex="20pt"/>
    </style:style>
    <style:style style:name="P29" style:family="paragraph" style:parent-style-name="Standard" style:list-style-name="L3">
      <style:text-properties style:font-name="Liberation Sans" fo:font-size="18pt" officeooo:rsid="0004ddb0" officeooo:paragraph-rsid="000d1817" style:font-size-asian="18pt" style:font-size-complex="18pt"/>
    </style:style>
    <style:style style:name="P30" style:family="paragraph" style:parent-style-name="Standard" style:list-style-name="L4">
      <style:text-properties style:font-name="Liberation Sans" fo:font-size="18pt" officeooo:rsid="0004ddb0" officeooo:paragraph-rsid="000d1817" style:font-size-asian="18pt" style:font-size-complex="18pt"/>
    </style:style>
    <style:style style:name="P31" style:family="paragraph" style:parent-style-name="Standard" style:list-style-name="L5">
      <style:text-properties style:font-name="Liberation Sans" fo:font-size="18pt" officeooo:rsid="0004ddb0" officeooo:paragraph-rsid="000d1817" style:font-size-asian="18pt" style:font-size-complex="18pt"/>
    </style:style>
    <style:style style:name="P32" style:family="paragraph" style:parent-style-name="Standard" style:list-style-name="L6">
      <style:text-properties style:font-name="Liberation Sans" fo:font-size="18pt" officeooo:rsid="0004ddb0" officeooo:paragraph-rsid="000d1817" style:font-size-asian="18pt" style:font-size-complex="18pt"/>
    </style:style>
    <style:style style:name="P33" style:family="paragraph" style:parent-style-name="Standard" style:list-style-name="L15">
      <style:text-properties style:font-name="Liberation Sans" fo:font-size="18pt" officeooo:rsid="0004ddb0" officeooo:paragraph-rsid="0004ddb0" style:font-size-asian="18pt" style:font-size-complex="18pt"/>
    </style:style>
    <style:style style:name="P34" style:family="paragraph" style:parent-style-name="Standard" style:list-style-name="L7">
      <style:text-properties style:font-name="Liberation Sans" fo:font-size="18pt" officeooo:rsid="000e5078" officeooo:paragraph-rsid="000e5078" style:font-size-asian="18pt" style:font-size-complex="18pt"/>
    </style:style>
    <style:style style:name="P35" style:family="paragraph" style:parent-style-name="Standard" style:list-style-name="L8">
      <style:text-properties style:font-name="Liberation Sans" fo:font-size="18pt" officeooo:rsid="000e5078" officeooo:paragraph-rsid="000e5078" style:font-size-asian="18pt" style:font-size-complex="18pt"/>
    </style:style>
    <style:style style:name="P36" style:family="paragraph" style:parent-style-name="Standard" style:list-style-name="L9">
      <style:text-properties style:font-name="Liberation Sans" fo:font-size="18pt" officeooo:rsid="000e5078" officeooo:paragraph-rsid="000e5078" style:font-size-asian="18pt" style:font-size-complex="18pt"/>
    </style:style>
    <style:style style:name="P37" style:family="paragraph" style:parent-style-name="Standard" style:list-style-name="L10">
      <style:text-properties style:font-name="Liberation Sans" fo:font-size="18pt" officeooo:rsid="000e5078" officeooo:paragraph-rsid="000e5078" style:font-size-asian="18pt" style:font-size-complex="18pt"/>
    </style:style>
    <style:style style:name="P38" style:family="paragraph" style:parent-style-name="Standard" style:list-style-name="L11">
      <style:text-properties style:font-name="Liberation Sans" fo:font-size="18pt" style:text-underline-style="none" officeooo:rsid="0004ddb0" officeooo:paragraph-rsid="000d1817" style:font-size-asian="18pt" style:font-size-complex="18pt"/>
    </style:style>
    <style:style style:name="P39" style:family="paragraph" style:parent-style-name="Standard" style:list-style-name="L12">
      <style:text-properties style:font-name="Liberation Sans" fo:font-size="18pt" style:text-underline-style="none" officeooo:rsid="0004ddb0" officeooo:paragraph-rsid="000d1817" style:font-size-asian="18pt" style:font-size-complex="18pt"/>
    </style:style>
    <style:style style:name="P40" style:family="paragraph" style:parent-style-name="Standard" style:list-style-name="L13">
      <style:text-properties style:font-name="Liberation Sans" fo:font-size="18pt" style:text-underline-style="none" officeooo:rsid="0004ddb0" officeooo:paragraph-rsid="000d1817" style:font-size-asian="18pt" style:font-size-complex="18pt"/>
    </style:style>
    <style:style style:name="P41" style:family="paragraph" style:parent-style-name="Standard" style:list-style-name="L14">
      <style:text-properties style:font-name="Liberation Sans" fo:font-size="18pt" style:text-underline-style="none" officeooo:rsid="0004ddb0" officeooo:paragraph-rsid="000d1817" style:font-size-asian="18pt" style:font-size-complex="18pt"/>
    </style:style>
    <style:style style:name="P42" style:family="paragraph" style:parent-style-name="Standard">
      <style:text-properties officeooo:rsid="000723b7"/>
    </style:style>
    <style:style style:name="P43" style:family="paragraph" style:parent-style-name="Text_20_body" style:list-style-name="L15">
      <style:text-properties style:font-name="Liberation Sans" fo:font-size="18pt" officeooo:paragraph-rsid="0004ddb0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1611"/>
    </style:style>
    <style:style style:name="T4" style:family="text">
      <style:text-properties style:text-underline-style="solid" style:text-underline-width="auto" style:text-underline-color="font-color" officeooo:rsid="0004ddb0"/>
    </style:style>
    <style:style style:name="T5" style:family="text">
      <style:text-properties officeooo:rsid="000c353d"/>
    </style:style>
    <style:style style:name="T6" style:family="text">
      <style:text-properties officeooo:rsid="000d181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e5078"/>
    </style:style>
    <style:style style:name="T9" style:family="text">
      <style:text-properties style:text-underline-style="none" officeooo:rsid="00101611"/>
    </style:style>
    <style:style style:name="T10" style:family="text">
      <style:text-properties officeooo:rsid="000e5078"/>
    </style:style>
    <style:style style:name="T11" style:family="text">
      <style:text-properties officeooo:rsid="00101611"/>
    </style:style>
    <style:style style:name="T12" style:family="text">
      <style:text-properties officeooo:rsid="0004ddb0"/>
    </style:style>
    <style:style style:name="T13" style:family="text">
      <style:text-properties officeooo:rsid="0012e2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1) Dataset Preparation</text:p>
      <text:p text:style-name="P3"/>
      <text:p text:style-name="P3">1.1)Loading the dataset:</text:p>
      <text:p text:style-name="P3"/>
      <text:p text:style-name="P2"><draw:frame draw:style-name="fr1" draw:name="Image1" text:anchor-type="char" svg:x="-1.857cm" svg:y="0.478cm" svg:width="21.407cm" svg:height="17.776cm" draw:z-index="18"><draw:image xlink:href="Pictures/100000010000055300000319FC258137.png" xlink:type="simple" xlink:show="embed" xlink:actuate="onLoad" draw:mime-type="image/png"/></draw:frame></text:p>
      <text:p text:style-name="Standard"/>
      <text:p text:style-name="P42"><text:soft-page-break/></text:p>
      <text:p text:style-name="P22"/>
      <text:p text:style-name="P23"/>
      <text:p text:style-name="P3">1.2) Handling Missing Values:</text:p>
      <text:p text:style-name="Standard"/>
      <text:p text:style-name="Standard"/>
      <text:p text:style-name="Standard"><draw:frame draw:style-name="fr1" draw:name="Image2" text:anchor-type="char" svg:x="-1.827cm" svg:y="0.023cm" svg:width="20.78cm" svg:height="15.355cm" draw:z-index="4"><draw:image xlink:href="Pictures/10000001000003E0000002DDB43829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9">2) EDA :</text:p>
      <text:p text:style-name="P19">2.1) Understand Data Distribution</text:p>
      <text:p text:style-name="P19"/>
      <text:p text:style-name="P19"><draw:frame draw:style-name="fr1" draw:name="Image3" text:anchor-type="char" svg:x="-0.397cm" svg:y="0.344cm" svg:width="17.59cm" svg:height="6.666cm" draw:z-index="5"><draw:image xlink:href="Pictures/10000001000003BB0000016AFAB98722.png" xlink:type="simple" xlink:show="embed" xlink:actuate="onLoad" draw:mime-type="image/png"/></draw:frame></text:p>
      <text:p text:style-name="P19"/>
      <text:p text:style-name="P19"><draw:frame draw:style-name="fr4" draw:name="Image4" text:anchor-type="char" svg:width="17.59cm" svg:height="17.339cm" draw:z-index="6"><draw:image xlink:href="Pictures/100000000000035000000344BB23318A.png" xlink:type="simple" xlink:show="embed" xlink:actuate="onLoad" draw:mime-type="image/png"/></draw:frame><text:soft-page-break/></text:p>
      <text:p text:style-name="P19"><draw:frame draw:style-name="fr3" draw:name="Image6" text:anchor-type="char" svg:width="15.584cm" svg:height="11.43cm" draw:z-index="7"><draw:image xlink:href="Pictures/100000000000024D000001B08FC290C7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><draw:frame draw:style-name="fr1" draw:name="Image7" text:anchor-type="char" svg:x="0.049cm" svg:y="2.84cm" svg:width="17.59cm" svg:height="4.433cm" draw:z-index="9"><draw:image xlink:href="Pictures/10000001000003BC000000F1188BC9DC.png" xlink:type="simple" xlink:show="embed" xlink:actuate="onLoad" draw:mime-type="image/png"/></draw:frame><text:soft-page-break/>2.2) Class balance</text:p>
      <text:p text:style-name="P19"/>
      <text:p text:style-name="P19"/>
      <text:p text:style-name="P19"><draw:frame draw:style-name="fr3" draw:name="Image5" text:anchor-type="char" svg:width="15.584cm" svg:height="12.039cm" draw:z-index="8"><draw:image xlink:href="Pictures/100000000000024D000001C79EE34DB1.png" xlink:type="simple" xlink:show="embed" xlink:actuate="onLoad" draw:mime-type="image/png"/></draw:frame></text:p>
      <text:p text:style-name="P19"/>
      <text:p text:style-name="P19"/>
      <text:p text:style-name="P19">2.4) Outlier Detection</text:p>
      <text:p text:style-name="P19"/>
      <text:p text:style-name="P19"/>
      <text:p text:style-name="P19"><draw:frame draw:style-name="fr1" draw:name="Image12" text:anchor-type="char" svg:x="-2cm" svg:y="0.522cm" svg:width="21.548cm" svg:height="3.865cm" draw:z-index="0"><draw:image xlink:href="Pictures/1000000100000397000000681FD99376.png" xlink:type="simple" xlink:show="embed" xlink:actuate="onLoad" draw:mime-type="image/png"/></draw:frame></text:p>
      <text:p text:style-name="P19"><draw:frame draw:style-name="fr3" draw:name="Image8" text:anchor-type="char" svg:width="15.002cm" svg:height="11.007cm" draw:z-index="10"><draw:image xlink:href="Pictures/1000000000000237000001A0E3493894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3) Train-test Split</text:p>
      <text:p text:style-name="P19">3.1) <text:s/>Encode Categorical Data</text:p>
      <text:p text:style-name="P19"><draw:frame draw:style-name="fr1" draw:name="Image9" text:anchor-type="char" svg:x="0.766cm" svg:y="0.37cm" svg:width="16.536cm" svg:height="5.715cm" draw:z-index="11"><draw:image xlink:href="Pictures/1000000100000271000000D817BD3EBE.png" xlink:type="simple" xlink:show="embed" xlink:actuate="onLoad" draw:mime-type="image/png"/></draw:frame></text:p>
      <text:p text:style-name="P19">3.2) Split Data</text:p>
      <text:p text:style-name="P19"/>
      <text:p text:style-name="P19"><draw:frame draw:style-name="fr2" draw:name="Image10" text:anchor-type="char" svg:width="17.59cm" svg:height="5.112cm" draw:z-index="12"><draw:image xlink:href="Pictures/100000010000032C000000EC18878122.png" xlink:type="simple" xlink:show="embed" xlink:actuate="onLoad" draw:mime-type="image/png"/></draw:frame></text:p>
      <text:p text:style-name="P4"><draw:frame draw:style-name="fr1" draw:name="Image19" text:anchor-type="char" svg:x="2.782cm" svg:y="0.178cm" svg:width="8.996cm" svg:height="1.482cm" draw:z-index="17"><draw:image xlink:href="Pictures/10000001000001540000003835098C2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4) Applying ML Algorithms:</text:p>
      <text:p text:style-name="P4">4.1) Logistic Regression</text:p>
      <text:p text:style-name="P20"><draw:frame draw:style-name="fr1" draw:name="Image11" text:anchor-type="char" svg:x="0.265cm" svg:y="0.238cm" svg:width="17.59cm" svg:height="6.311cm" draw:z-index="13"><draw:image xlink:href="Pictures/100000010000029A000000EF81334498.png" xlink:type="simple" xlink:show="embed" xlink:actuate="onLoad" draw:mime-type="image/png"/></draw:frame></text:p>
      <text:p text:style-name="P4"/>
      <text:p text:style-name="P4">4.<text:span text:style-name="T5">2</text:span>)Decision Tree</text:p>
      <text:p text:style-name="P4"><draw:frame draw:style-name="fr1" draw:name="Image16" text:anchor-type="char" svg:x="-2.043cm" svg:y="0.661cm" svg:width="21.34cm" svg:height="4.995cm" draw:z-index="1"><draw:image xlink:href="Pictures/10000001000003AA000000DEDE359E0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3) Random Forest</text:p>
      <text:p text:style-name="P20"/>
      <text:p text:style-name="P20"><draw:frame draw:style-name="fr1" draw:name="Image17" text:anchor-type="char" svg:x="-1.598cm" svg:y="0.494cm" svg:width="20.777cm" svg:height="6.465cm" draw:z-index="2"><draw:image xlink:href="Pictures/10000001000003AA000000DE10A3A94E.png" xlink:type="simple" xlink:show="embed" xlink:actuate="onLoad" draw:mime-type="image/png"/></draw:frame></text:p>
      <text:p text:style-name="P20"/>
      <text:p text:style-name="P20">4.4) Gradient Boosting</text:p>
      <text:p text:style-name="P21"><draw:frame draw:style-name="fr1" draw:name="Image18" text:anchor-type="char" svg:x="-1.429cm" svg:y="0.436cm" svg:width="20.447cm" svg:height="5.263cm" draw:z-index="3"><draw:image xlink:href="Pictures/10000001000003A1000000E5692F10E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5) Evaluation Metrics</text:p>
      <text:p text:style-name="P4"/>
      <text:p text:style-name="P4">5.1) Evaluating Models</text:p>
      <text:p text:style-name="P4"><draw:frame draw:style-name="fr1" draw:name="Image13" text:anchor-type="char" svg:x="-1.55cm" svg:y="0.644cm" svg:width="20.59cm" svg:height="15.737cm" draw:z-index="14"><draw:image xlink:href="Pictures/10000001000003EB000002CD9BE8A8A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5.2) Plotting ROC Curves</text:p>
      <text:p text:style-name="Standard"/>
      <text:p text:style-name="Standard"><draw:frame draw:style-name="fr1" draw:name="Image14" text:anchor-type="char" svg:x="-1.61cm" svg:y="0.005cm" svg:width="20.59cm" svg:height="5.225cm" draw:z-index="15"><draw:image xlink:href="Pictures/10000001000005FA0000015126981F39.png" xlink:type="simple" xlink:show="embed" xlink:actuate="onLoad" draw:mime-type="image/png"/></draw:frame></text:p>
      <text:p text:style-name="P1"><draw:frame draw:style-name="fr1" draw:name="Image15" text:anchor-type="char" svg:x="-1.244cm" svg:y="1.411cm" svg:width="18.613cm" svg:height="15.422cm" draw:z-index="16"><draw:image xlink:href="Pictures/100000000000034E000002BDC41B61DC.png" xlink:type="simple" xlink:show="embed" xlink:actuate="onLoad" draw:mime-type="image/png"/></draw:frame></text:p>
      <text:p text:style-name="P1"/>
      <text:p text:style-name="P13"><text:soft-page-break/><text:span text:style-name="T12">6) </text:span><text:span text:style-name="T4">Comparing Results</text:span></text:p>
      <text:p text:style-name="P13"><text:span text:style-name="T4"/></text:p>
      <text:list text:style-name="L1">
        <text:list-header>
          <text:p text:style-name="P24"><text:span text:style-name="T4">E</text:span><text:span text:style-name="T2">valuation Metrics</text:span></text:p>
          <text:p text:style-name="P24"><text:span text:style-name="T2"/></text:p>
        </text:list-header>
        <text:list-item>
          <text:p text:style-name="P25">Accuracy: Overall correctness of predictions.</text:p>
        </text:list-item>
        <text:list-item>
          <text:p text:style-name="P25">Precision: Proportion of positive predictions that are actually positive.</text:p>
        </text:list-item>
        <text:list-item>
          <text:p text:style-name="P25">Recall: Proportion of actual positive cases correctly identified.</text:p>
        </text:list-item>
        <text:list-item>
          <text:p text:style-name="P25">F1-Score: Harmonic mean of precision and recall,</text:p>
          <text:p text:style-name="P25">balancing both. </text:p>
        </text:list-item>
        <text:list-item>
          <text:p text:style-name="P25">AUC-ROC: Area Under the Receiver Operating Characteristic curve, measuring a model's ability to distinguish between positive and negative classes. </text:p>
          <text:p text:style-name="P26"><text:span text:style-name="T4"/></text:p>
        </text:list-item>
      </text:list>
      <text:list text:style-name="L2">
        <text:list-item>
          <text:p text:style-name="P27"><text:span text:style-name="T8">Based on Evaluation Metrics</text:span><text:span text:style-name="T4"><text:line-break/></text:span></text:p>
        </text:list-item>
      </text:list>
      <text:p text:style-name="P15"><text:span text:style-name="T8">6.1)a) </text:span>Accuracy</text:p>
      <text:p text:style-name="P5"/>
      <text:list text:style-name="L3">
        <text:list-item>
          <text:p text:style-name="P29">Gradient Boosting and Random Forest have the highest accuracy, indicating they correctly classify the most instances.</text:p>
        </text:list-item>
        <text:list-item>
          <text:p text:style-name="P29">Logistic Regression has a lower accuracy but still performs reasonably well.</text:p>
        </text:list-item>
        <text:list-item>
          <text:p text:style-name="P29">Decision Tree has the lowest accuracy, suggesting it may be overfitting the training data.<text:span text:style-name="T13">\</text:span></text:p>
        </text:list-item>
      </text:list>
      <text:p text:style-name="P5"/>
      <text:p text:style-name="P5"/>
      <text:p text:style-name="P5"/>
      <text:list text:continue-numbering="true" text:style-name="L3">
        <text:list-header>
          <text:p text:style-name="P29"/>
        </text:list-header>
      </text:list>
      <text:p text:style-name="P11"><text:soft-page-break/><text:span text:style-name="T10">b) </text:span><text:span text:style-name="T2">Precision</text:span></text:p>
      <text:p text:style-name="P5"/>
      <text:list text:style-name="L4">
        <text:list-item>
          <text:p text:style-name="P30">Random Forest and Gradient Boosting have the highest precision, meaning they have a low false positive rate.</text:p>
        </text:list-item>
        <text:list-item>
          <text:p text:style-name="P30">Logistic Regression has a relatively high precision, but it's lower than the other two models.</text:p>
        </text:list-item>
        <text:list-item>
          <text:p text:style-name="P30">Decision Tree has the lowest precision, indicating it might be prone to false positives.</text:p>
        </text:list-item>
      </text:list>
      <text:p text:style-name="P11"/>
      <text:p text:style-name="P11"><text:span text:style-name="T10">c) </text:span><text:span text:style-name="T2">Recall</text:span></text:p>
      <text:p text:style-name="P5"/>
      <text:list text:style-name="L5">
        <text:list-item>
          <text:p text:style-name="P31">All models struggle with recall, which means they have difficulty identifying positive instances.</text:p>
        </text:list-item>
        <text:list-item>
          <text:p text:style-name="P31">Logistic Regression has the lowest recall, suggesting it might be missing many true positive cases.</text:p>
        </text:list-item>
        <text:list-item>
          <text:p text:style-name="P31">Random Forest and Gradient Boosting have slightly better recall, but still relatively low.</text:p>
          <text:p text:style-name="P31"/>
        </text:list-item>
      </text:list>
      <text:p text:style-name="P11"><text:span text:style-name="T10">d) </text:span><text:span text:style-name="T2">F1-Score</text:span></text:p>
      <text:list text:style-name="L6">
        <text:list-header>
          <text:p text:style-name="P32"/>
        </text:list-header>
        <text:list-item>
          <text:p text:style-name="P32">F1-Score considers both precision and recall.</text:p>
        </text:list-item>
        <text:list-item>
          <text:p text:style-name="P32">Random Forest has the highest F1-Score, indicating a better balance between precision and recall.</text:p>
        </text:list-item>
        <text:list-item>
          <text:p text:style-name="P32">Gradient Boosting and Logistic Regression have similar F1-Scores, suggesting a trade-off between precision and recall.</text:p>
        </text:list-item>
        <text:list-item>
          <text:p text:style-name="P32">Decision Tree has the lowest F1-Score, indicating a poor balance between precision and recall.</text:p>
          <text:p text:style-name="P28"/>
        </text:list-item>
      </text:list>
      <text:p text:style-name="P11"/>
      <text:p text:style-name="P14"/>
      <text:p text:style-name="P11"><text:soft-page-break/><text:span text:style-name="T6">6</text:span>.<text:span text:style-name="T6">2)</text:span> <text:span text:style-name="T2">ROC Curves</text:span></text:p>
      <text:p text:style-name="P10"/>
      <text:p text:style-name="P12">a)<text:span text:style-name="T2">Gradient Boosting</text:span></text:p>
      <text:p text:style-name="P7"/>
      <text:list text:style-name="L7">
        <text:list-item>
          <text:p text:style-name="P34">It has the highest AUC-ROC score (0.78).</text:p>
        </text:list-item>
        <text:list-item>
          <text:p text:style-name="P34">This indicates that it has the best overall performance in distinguishing between positive and negative classes.</text:p>
        </text:list-item>
        <text:list-item>
          <text:p text:style-name="P34">It has a steeper curve, suggesting that it can achieve higher true positive rates with lower false positive rates.</text:p>
        </text:list-item>
      </text:list>
      <text:p text:style-name="P7"/>
      <text:p text:style-name="P12">b)<text:span text:style-name="T2">Random Forest</text:span></text:p>
      <text:p text:style-name="P7"/>
      <text:list text:style-name="L8">
        <text:list-item>
          <text:p text:style-name="P35">Has a good performance with an AUC-ROC score of 0.75.</text:p>
        </text:list-item>
        <text:list-item>
          <text:p text:style-name="P35">It's a strong contender, especially if interpretability is a concern.</text:p>
        </text:list-item>
      </text:list>
      <text:p text:style-name="P7"/>
      <text:p text:style-name="P7"/>
      <text:p text:style-name="P12">c)<text:span text:style-name="T7"> </text:span><text:span text:style-name="T2">Logistic Regression</text:span></text:p>
      <text:p text:style-name="P12"/>
      <text:list text:style-name="L9">
        <text:list-item>
          <text:p text:style-name="P36">Has a decent performance with an AUC-ROC score of 0.71.</text:p>
        </text:list-item>
        <text:list-item>
          <text:p text:style-name="P36">It's a good baseline model and can be a good choice for simpler problems.</text:p>
        </text:list-item>
      </text:list>
      <text:p text:style-name="P7"/>
      <text:p text:style-name="P12">d)<text:span text:style-name="T2">Decision Tree</text:span></text:p>
      <text:p text:style-name="P12"/>
      <text:list text:style-name="L10">
        <text:list-item>
          <text:p text:style-name="P37">Has the lowest AUC-ROC score (0.58), indicating weaker performance compared to the other models.</text:p>
        </text:list-item>
        <text:list-item>
          <text:p text:style-name="P37">It might be overfitting the training data or underfitting the complexity of the problem.</text:p>
        </text:list-item>
      </text:list>
      <text:p text:style-name="P7"/>
      <text:p text:style-name="P11"><text:soft-page-break/><text:span text:style-name="T6">6.</text:span>3<text:span text:style-name="T6">)</text:span> <text:span text:style-name="T2">Model Selection</text:span></text:p>
      <text:p text:style-name="P11"><text:span text:style-name="T2"/></text:p>
      <text:p text:style-name="P11"><text:span text:style-name="T9">a)</text:span><text:span text:style-name="T2">Gradient Boosting</text:span></text:p>
      <text:p text:style-name="P11"><text:span text:style-name="T2"/></text:p>
      <text:list text:style-name="L11">
        <text:list-item>
          <text:p text:style-name="P38">Highest AUC-ROC score, indicating strong overall performance.</text:p>
        </text:list-item>
        <text:list-item>
          <text:p text:style-name="P38">Good balance between precision and recall.</text:p>
        </text:list-item>
        <text:list-item>
          <text:p text:style-name="P38">Often a powerful choice for complex classification problems.</text:p>
          <text:p text:style-name="P38"/>
        </text:list-item>
      </text:list>
      <text:p text:style-name="P16"><text:span text:style-name="T11">b)</text:span><text:span text:style-name="T2">Random Forest</text:span></text:p>
      <text:p text:style-name="P8"/>
      <text:list text:style-name="L12">
        <text:list-item>
          <text:p text:style-name="P39">Solid performance across all metrics.</text:p>
        </text:list-item>
        <text:list-item>
          <text:p text:style-name="P39">Can handle complex decision boundaries and is less prone to overfitting</text:p>
        </text:list-item>
      </text:list>
      <text:p text:style-name="P8"/>
      <text:p text:style-name="P8"/>
      <text:p text:style-name="P16"><text:span text:style-name="T11">c) </text:span><text:span text:style-name="T2">Logistic Regression</text:span></text:p>
      <text:p text:style-name="P8"/>
      <text:list text:style-name="L13">
        <text:list-item>
          <text:p text:style-name="P40">While it performs reasonably well, it might struggle with complex datasets.</text:p>
        </text:list-item>
        <text:list-item>
          <text:p text:style-name="P40">It's a good baseline model and can be a good choice for simpler problems.</text:p>
        </text:list-item>
      </text:list>
      <text:p text:style-name="P8"/>
      <text:p text:style-name="P16"><text:span text:style-name="T11">d) </text:span><text:span text:style-name="T2">Decision Tree</text:span></text:p>
      <text:p text:style-name="P8"/>
      <text:list text:style-name="L14">
        <text:list-item>
          <text:p text:style-name="P41">Lowest performance across all metrics, indicating potential overfitting or underfitting.</text:p>
        </text:list-item>
      </text:list>
      <text:p text:style-name="P9"/>
      <text:p text:style-name="P6"/>
      <text:p text:style-name="P6"/>
      <text:p text:style-name="P17"><text:soft-page-break/>6.4) <text:span text:style-name="T2">Conclusion</text:span></text:p>
      <text:p text:style-name="P18"/>
      <text:list text:style-name="L15">
        <text:list-item>
          <text:p text:style-name="P33"><text:span text:style-name="T2">Gradient Boosting</text:span>: <text:span text:style-name="T1">Best choice</text:span> if <text:span text:style-name="T11">we</text:span> prioritize overall model performance based on AUC-ROC and precision.</text:p>
          <text:p text:style-name="P33"/>
        </text:list-item>
        <text:list-item>
          <text:p text:style-name="P33"><text:span text:style-name="T3">Random Forest</text:span>: Preferred for a simpler model with good balance across metrics, especially for recall-focused application<text:span text:style-name="T6">s.</text:span></text:p>
          <text:p text:style-name="P4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3:11:18.295704071</meta:creation-date>
    <meta:generator>LibreOffice/24.2.6.2$Linux_X86_64 LibreOffice_project/420$Build-2</meta:generator>
    <dc:date>2024-12-12T00:16:20.074984722</dc:date>
    <meta:editing-duration>PT2H35M22S</meta:editing-duration>
    <meta:editing-cycles>20</meta:editing-cycles>
    <meta:document-statistic meta:table-count="0" meta:image-count="19" meta:object-count="0" meta:page-count="17" meta:paragraph-count="83" meta:word-count="595" meta:character-count="3790" meta:non-whitespace-character-count="3314"/>
  </office:meta>
</office:document-meta>
</file>