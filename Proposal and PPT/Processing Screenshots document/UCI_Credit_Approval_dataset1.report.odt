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1000000E5692F10EA.png" manifest:media-type="image/png"/>
  <manifest:file-entry manifest:full-path="Pictures/10000001000003AA000000DEDE359E04.png" manifest:media-type="image/png"/>
  <manifest:file-entry manifest:full-path="Pictures/10000001000003B8000000DE5891983E.png" manifest:media-type="image/png"/>
  <manifest:file-entry manifest:full-path="Pictures/10000001000003A500000343DE3A0B0D.png" manifest:media-type="image/png"/>
  <manifest:file-entry manifest:full-path="Pictures/100000000000034E000002BDB7522921.png" manifest:media-type="image/png"/>
  <manifest:file-entry manifest:full-path="Pictures/1000000100000394000002C9AE8510F0.png" manifest:media-type="image/png"/>
  <manifest:file-entry manifest:full-path="Pictures/1000000100000382000000F3E754D2E9.png" manifest:media-type="image/png"/>
  <manifest:file-entry manifest:full-path="Pictures/10000001000003AB000002A41DE8D531.png" manifest:media-type="image/png"/>
  <manifest:file-entry manifest:full-path="Pictures/10000001000003860000008737D4EC6E.png" manifest:media-type="image/png"/>
  <manifest:file-entry manifest:full-path="Pictures/10000001000003A70000013C800F14FA.png" manifest:media-type="image/png"/>
  <manifest:file-entry manifest:full-path="Pictures/100000000000034A000003440264E7BB.png" manifest:media-type="image/png"/>
  <manifest:file-entry manifest:full-path="Pictures/1000000000000232000001B0F475CD56.png" manifest:media-type="image/png"/>
  <manifest:file-entry manifest:full-path="Pictures/1000000100000397000000681FD99376.png" manifest:media-type="image/png"/>
  <manifest:file-entry manifest:full-path="Pictures/1000000000000226000001B060835570.png" manifest:media-type="image/png"/>
  <manifest:file-entry manifest:full-path="Pictures/10000001000003AA000000DE10A3A94E.png" manifest:media-type="image/png"/>
  <manifest:file-entry manifest:full-path="Pictures/1000000000000232000001A09682F5F3.png" manifest:media-type="image/png"/>
  <manifest:file-entry manifest:full-path="Pictures/100000010000039D000000B87A9BBA6C.png" manifest:media-type="image/png"/>
  <manifest:file-entry manifest:full-path="Pictures/1000000000000237000001C7C8025993.png" manifest:media-type="image/png"/>
  <manifest:file-entry manifest:full-path="Pictures/100000000000020F000001B31F0B8F73.png" manifest:media-type="image/png"/>
  <manifest:file-entry manifest:full-path="Pictures/10000001000003500000014C2FE9F9C6.png" manifest:media-type="image/png"/>
  <manifest:file-entry manifest:full-path="Pictures/1000000000000232000001A04467D9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8pt" style:font-size-asian="15.75pt" style:font-size-complex="18pt"/>
    </style:style>
    <style:style style:name="P3" style:family="paragraph" style:parent-style-name="Standard">
      <style:text-properties style:font-name="Liberation Sans" fo:font-size="18pt" officeooo:rsid="0002f0c9" officeooo:paragraph-rsid="0002f0c9" style:font-size-asian="15.75pt" style:font-size-complex="18pt"/>
    </style:style>
    <style:style style:name="P4" style:family="paragraph" style:parent-style-name="Standard">
      <style:text-properties style:font-name="Liberation Sans" fo:font-size="18pt" officeooo:rsid="0004ddb0" officeooo:paragraph-rsid="0004ddb0" style:font-size-asian="15.75pt" style:font-size-complex="18pt"/>
    </style:style>
    <style:style style:name="P5" style:family="paragraph" style:parent-style-name="Standard"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8pt" officeooo:rsid="0002f0c9" officeooo:paragraph-rsid="0002f0c9" style:font-size-asian="18pt" style:font-size-complex="18pt"/>
    </style:style>
    <style:style style:name="P7" style:family="paragraph" style:parent-style-name="Standard">
      <style:text-properties style:font-name="Liberation Sans" fo:font-size="18pt" officeooo:rsid="0004ddb0" officeooo:paragraph-rsid="0004ddb0" style:font-size-asian="18pt" style:font-size-complex="18pt"/>
    </style:style>
    <style:style style:name="P8" style:family="paragraph" style:parent-style-name="Standard">
      <style:text-properties style:font-name="Liberation Sans" fo:font-size="18pt" style:text-underline-style="none" officeooo:rsid="0004ddb0" officeooo:paragraph-rsid="0004ddb0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8pt" style:text-underline-style="none" officeooo:rsid="0004ddb0" officeooo:paragraph-rsid="0004ddb0" style:font-size-asian="18pt" style:font-size-complex="18pt"/>
    </style:style>
    <style:style style:name="P10" style:family="paragraph" style:parent-style-name="Standard">
      <style:text-properties style:font-name="Liberation Sans" fo:font-size="20pt" officeooo:rsid="00051e6c" officeooo:paragraph-rsid="00051e6c" style:font-size-asian="20pt" style:font-size-complex="20pt"/>
    </style:style>
    <style:style style:name="P11" style:family="paragraph" style:parent-style-name="Text_20_body">
      <style:text-properties style:font-name="Liberation Sans" officeooo:paragraph-rsid="00051e6c"/>
    </style:style>
    <style:style style:name="P12" style:family="paragraph" style:parent-style-name="Standard">
      <style:text-properties style:font-name="Liberation Sans" fo:font-size="22pt" officeooo:rsid="00051e6c" officeooo:paragraph-rsid="00051e6c" style:font-size-asian="22pt" style:font-size-complex="22pt"/>
    </style:style>
    <style:style style:name="P13" style:family="paragraph" style:parent-style-name="Standard">
      <style:text-properties style:font-name="Liberation Serif" fo:font-size="18pt" officeooo:rsid="0002f0c9" officeooo:paragraph-rsid="0002f0c9" style:font-size-asian="15.75pt" style:font-size-complex="18pt"/>
    </style:style>
    <style:style style:name="P14" style:family="paragraph" style:parent-style-name="Standard">
      <style:text-properties style:font-name="Liberation Serif" fo:font-size="18pt" officeooo:rsid="0004ddb0" officeooo:paragraph-rsid="0004ddb0" style:font-size-asian="15.75pt" style:font-size-complex="18pt"/>
    </style:style>
    <style:style style:name="P15" style:family="paragraph" style:parent-style-name="Standard">
      <style:text-properties officeooo:paragraph-rsid="0002f0c9"/>
    </style:style>
    <style:style style:name="P16" style:family="paragraph" style:parent-style-name="Text_20_body">
      <style:text-properties officeooo:paragraph-rsid="0004ddb0"/>
    </style:style>
    <style:style style:name="P17" style:family="paragraph" style:parent-style-name="Standard">
      <style:text-properties officeooo:paragraph-rsid="0007862e"/>
    </style:style>
    <style:style style:name="P18" style:family="paragraph" style:parent-style-name="Standard" style:list-style-name="L8">
      <style:text-properties officeooo:paragraph-rsid="00051e6c"/>
    </style:style>
    <style:style style:name="P19" style:family="paragraph" style:parent-style-name="Standard" style:list-style-name="L8">
      <style:text-properties style:font-name="Liberation Sans" fo:font-size="22pt" officeooo:rsid="00051e6c" officeooo:paragraph-rsid="00051e6c" style:font-size-asian="22pt" style:font-size-complex="22pt"/>
    </style:style>
    <style:style style:name="P20" style:family="paragraph" style:parent-style-name="Standard" style:list-style-name="L8">
      <style:text-properties style:font-name="Liberation Sans" officeooo:rsid="0007862e" officeooo:paragraph-rsid="0007862e"/>
    </style:style>
    <style:style style:name="P21" style:family="paragraph" style:parent-style-name="Standard">
      <style:text-properties style:font-name="Liberation Sans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1">
      <style:text-properties officeooo:paragraph-rsid="00051e6c"/>
    </style:style>
    <style:style style:name="P24" style:family="paragraph" style:parent-style-name="Text_20_body" style:list-style-name="L2">
      <style:text-properties style:font-name="Liberation Sans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26" style:family="paragraph" style:parent-style-name="Text_20_body" style:list-style-name="L6">
      <style:paragraph-properties fo:margin-top="0cm" fo:margin-bottom="0cm" style:contextual-spacing="false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28" style:family="paragraph" style:parent-style-name="Text_20_body" style:list-style-name="L7">
      <style:paragraph-properties fo:margin-top="0cm" fo:margin-bottom="0cm" style:contextual-spacing="false"/>
      <style:text-properties style:font-name="Liberation Sans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paragraph-properties fo:margin-top="0cm" fo:margin-bottom="0cm" style:contextual-spacing="false"/>
    </style:style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4">
      <style:paragraph-properties fo:margin-top="0cm" fo:margin-bottom="0cm" style:contextual-spacing="false"/>
    </style:style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6">
      <style:paragraph-properties fo:margin-top="0cm" fo:margin-bottom="0cm" style:contextual-spacing="false"/>
    </style:style>
    <style:style style:name="P37" style:family="paragraph" style:parent-style-name="Text_20_body" style:list-style-name="L7"/>
    <style:style style:name="P38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Liberation Sans" fo:font-size="18pt" fo:font-weight="normal" officeooo:rsid="00051e6c" style:font-size-asian="18pt" style:font-weight-asian="normal" style:font-size-complex="18pt" style:font-weight-complex="normal"/>
    </style:style>
    <style:style style:name="T3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style:font-name="Liberation Sans" fo:font-size="18pt" style:font-size-asian="18pt" style:font-size-complex="18pt"/>
    </style:style>
    <style:style style:name="T7" style:family="text">
      <style:text-properties style:font-name="Liberation Sans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Liberation Sans" fo:font-size="22pt" style:font-size-asian="22pt" style:font-size-complex="22pt"/>
    </style:style>
    <style:style style:name="T9" style:family="text">
      <style:text-properties style:font-name="Liberation Sans" fo:font-size="22pt" officeooo:rsid="00051e6c" style:font-size-asian="22pt" style:font-size-complex="22pt"/>
    </style:style>
    <style:style style:name="T10" style:family="text">
      <style:text-properties style:font-name="Liberation Sans" fo:font-size="22pt" officeooo:rsid="00052c0f" style:font-size-asian="22pt" style:font-size-complex="2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Standard"/>
      <text:p text:style-name="P3">1) Dataset Preparation</text:p>
      <text:p text:style-name="P3"/>
      <text:p text:style-name="P3">1.1)Loading the dataset:</text:p>
      <text:p text:style-name="P3"/>
      <text:p text:style-name="P2"/>
      <text:p text:style-name="Standard"><draw:frame draw:style-name="fr1" draw:name="Image1" text:anchor-type="char" svg:x="-1.238cm" svg:y="0.09cm" svg:width="20.195cm" svg:height="18cm" draw:z-index="20"><draw:image xlink:href="Pictures/10000001000003A500000343DE3A0B0D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3">1.2) Handling Missing Values:</text:p>
      <text:p text:style-name="P1"/>
      <text:p text:style-name="Standard"/>
      <text:p text:style-name="Standard"/>
      <text:p text:style-name="Standard"><draw:frame draw:style-name="fr1" draw:name="Image2" text:anchor-type="char" svg:x="-1.755cm" svg:y="0.369cm" svg:width="20.733cm" svg:height="18.711cm" draw:z-index="0"><draw:image xlink:href="Pictures/10000001000003AB000002A41DE8D531.png" xlink:type="simple" xlink:show="embed" xlink:actuate="onLoad" draw:mime-type="image/png"/></draw:frame></text:p>
      <text:p text:style-name="Standard"><text:soft-page-break/></text:p>
      <text:p text:style-name="Standard"/>
      <text:p text:style-name="P5"/>
      <text:p text:style-name="P6">2) EDA :</text:p>
      <text:p text:style-name="P6">2.1) Understand Data Distribution</text:p>
      <text:p text:style-name="P6"/>
      <text:p text:style-name="P13"><draw:frame draw:style-name="fr3" draw:name="Image3" text:anchor-type="char" svg:width="17.59cm" svg:height="17.463cm" draw:z-index="1"><draw:image xlink:href="Pictures/100000000000034A000003440264E7BB.png" xlink:type="simple" xlink:show="embed" xlink:actuate="onLoad" draw:mime-type="image/png"/></draw:frame></text:p>
      <text:p text:style-name="P13"/>
      <text:p text:style-name="P13"/>
      <text:p text:style-name="P13"><draw:frame draw:style-name="fr1" draw:name="Image4" text:anchor-type="char" svg:x="-2cm" svg:y="-1.039cm" svg:width="21.588cm" svg:height="5.634cm" draw:z-index="2"><draw:image xlink:href="Pictures/1000000100000382000000F3E754D2E9.png" xlink:type="simple" xlink:show="embed" xlink:actuate="onLoad" draw:mime-type="image/png"/></draw:frame><draw:frame draw:style-name="fr1" draw:name="Image5" text:anchor-type="char" svg:x="1.214cm" svg:y="4.895cm" svg:width="12.942cm" svg:height="9.948cm" draw:z-index="3"><draw:image xlink:href="Pictures/1000000000000232000001B0F475CD56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" text:anchor-type="char" svg:x="1.63cm" svg:y="0.224cm" svg:width="12.705cm" svg:height="9.98cm" draw:z-index="4"><draw:image xlink:href="Pictures/1000000000000226000001B06083557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">2.2) Class balance</text:p>
      <text:p text:style-name="P13"><draw:frame draw:style-name="fr1" draw:name="Image7" text:anchor-type="char" svg:x="0.993cm" svg:y="0.367cm" svg:width="15.002cm" svg:height="12.039cm" draw:z-index="5"><draw:image xlink:href="Pictures/1000000000000237000001C7C8025993.png" xlink:type="simple" xlink:show="embed" xlink:actuate="onLoad" draw:mime-type="image/png"/></draw:frame></text:p>
      <text:p text:style-name="P13"/>
      <text:p text:style-name="P13"/>
      <text:p text:style-name="P13"/>
      <text:p text:style-name="P3">2.3) Correlation Analysis</text:p>
      <text:p text:style-name="P13"/>
      <text:p text:style-name="P13"><draw:frame draw:style-name="fr2" draw:name="Image9" text:anchor-type="char" svg:width="21.091cm" svg:height="4.293cm" draw:z-index="7"><draw:image xlink:href="Pictures/10000001000003860000008737D4EC6E.png" xlink:type="simple" xlink:show="embed" xlink:actuate="onLoad" draw:mime-type="image/png"/></draw:frame></text:p>
      <text:p text:style-name="P13"><draw:frame draw:style-name="fr1" draw:name="Image8" text:anchor-type="char" svg:x="0.566cm" svg:y="-0.074cm" svg:width="15.032cm" svg:height="12.407cm" draw:z-index="6"><draw:image xlink:href="Pictures/100000000000020F000001B31F0B8F73.png" xlink:type="simple" xlink:show="embed" xlink:actuate="onLoad" draw:mime-type="image/png"/></draw:frame><text:soft-page-break/></text:p>
      <text:p text:style-name="P13"/>
      <text:p text:style-name="P3">2.4) Outlier Detection</text:p>
      <text:p text:style-name="P13"/>
      <text:p text:style-name="P13"/>
      <text:p text:style-name="P13"><draw:frame draw:style-name="fr1" draw:name="Image12" text:anchor-type="char" svg:x="-2cm" svg:y="0.522cm" svg:width="21.548cm" svg:height="3.865cm" draw:z-index="10"><draw:image xlink:href="Pictures/1000000100000397000000681FD99376.png" xlink:type="simple" xlink:show="embed" xlink:actuate="onLoad" draw:mime-type="image/png"/></draw:frame></text:p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1" draw:name="Image11" text:anchor-type="char" svg:x="0.355cm" svg:y="0.725cm" svg:width="14.87cm" svg:height="11.007cm" draw:z-index="9"><draw:image xlink:href="Pictures/1000000000000232000001A04467D99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0" text:anchor-type="char" svg:x="0.321cm" svg:y="0.542cm" svg:width="14.87cm" svg:height="11.007cm" draw:z-index="8"><draw:image xlink:href="Pictures/1000000000000232000001A09682F5F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3) Train-test Split</text:p>
      <text:p text:style-name="P3">3.1) <text:s/>Encode Categorical Data</text:p>
      <text:p text:style-name="P13"><draw:frame draw:style-name="fr1" draw:name="Image13" text:anchor-type="char" svg:x="-1.489cm" svg:y="0.669cm" svg:width="20.569cm" svg:height="8.777cm" draw:z-index="11"><draw:image xlink:href="Pictures/100000010000039D000000B87A9BBA6C.png" xlink:type="simple" xlink:show="embed" xlink:actuate="onLoad" draw:mime-type="image/png"/></draw:frame></text:p>
      <text:p text:style-name="P13">3.2) Split Data</text:p>
      <text:p text:style-name="P13"/>
      <text:p text:style-name="P13"><draw:frame draw:style-name="fr2" draw:name="Image14" text:anchor-type="char" svg:width="20.59cm" svg:height="10.269cm" draw:z-index="12"><draw:image xlink:href="Pictures/10000001000003A70000013C800F14FA.png" xlink:type="simple" xlink:show="embed" xlink:actuate="onLoad" draw:mime-type="image/png"/></draw:frame></text:p>
      <text:p text:style-name="P4"><text:soft-page-break/>4) Applying ML Algorithms:</text:p>
      <text:p text:style-name="P4">4.1) Logistic Regression</text:p>
      <text:p text:style-name="P14"><draw:frame draw:style-name="fr1" draw:name="Image15" text:anchor-type="char" svg:x="-2cm" svg:y="0.669cm" svg:width="21.588cm" svg:height="5.417cm" draw:z-index="13"><draw:image xlink:href="Pictures/10000001000003B8000000DE5891983E.png" xlink:type="simple" xlink:show="embed" xlink:actuate="onLoad" draw:mime-type="image/png"/></draw:frame></text:p>
      <text:p text:style-name="P4">4.2)Decision Tree</text:p>
      <text:p text:style-name="P4"><draw:frame draw:style-name="fr1" draw:name="Image16" text:anchor-type="char" svg:x="-2.043cm" svg:y="0.661cm" svg:width="21.34cm" svg:height="4.995cm" draw:z-index="14"><draw:image xlink:href="Pictures/10000001000003AA000000DEDE359E04.png" xlink:type="simple" xlink:show="embed" xlink:actuate="onLoad" draw:mime-type="image/png"/></draw:frame></text:p>
      <text:p text:style-name="P4">4.3) Random Forest</text:p>
      <text:p text:style-name="P14"/>
      <text:p text:style-name="P14"><draw:frame draw:style-name="fr1" draw:name="Image17" text:anchor-type="char" svg:x="-1.598cm" svg:y="0.494cm" svg:width="20.777cm" svg:height="6.465cm" draw:z-index="15"><draw:image xlink:href="Pictures/10000001000003AA000000DE10A3A94E.png" xlink:type="simple" xlink:show="embed" xlink:actuate="onLoad" draw:mime-type="image/png"/></draw:frame></text:p>
      <text:p text:style-name="P14"><text:soft-page-break/></text:p>
      <text:p text:style-name="P4">4.4) Gradient Boosting</text:p>
      <text:p text:style-name="P15"><draw:frame draw:style-name="fr1" draw:name="Image18" text:anchor-type="char" svg:x="-1.429cm" svg:y="0.436cm" svg:width="20.447cm" svg:height="5.263cm" draw:z-index="16"><draw:image xlink:href="Pictures/10000001000003A1000000E5692F10EA.png" xlink:type="simple" xlink:show="embed" xlink:actuate="onLoad" draw:mime-type="image/png"/></draw:frame></text:p>
      <text:p text:style-name="P4">5) Evaluation Metrics</text:p>
      <text:p text:style-name="P4">5.1) Evaluating Models</text:p>
      <text:p text:style-name="P4"><draw:frame draw:style-name="fr1" draw:name="Image19" text:anchor-type="char" svg:x="-1.889cm" svg:y="0.861cm" svg:width="20.967cm" svg:height="14.086cm" draw:z-index="17"><draw:image xlink:href="Pictures/1000000100000394000002C9AE8510F0.png" xlink:type="simple" xlink:show="embed" xlink:actuate="onLoad" draw:mime-type="image/png"/></draw:frame></text:p>
      <text:p text:style-name="P4"><text:soft-page-break/>5.2) Plotting ROC Curves</text:p>
      <text:p text:style-name="Standard"><draw:frame draw:style-name="fr1" draw:name="Image20" text:anchor-type="char" svg:x="-1.524cm" svg:y="0.439cm" svg:width="21.112cm" svg:height="8.204cm" draw:z-index="18"><draw:image xlink:href="Pictures/10000001000003500000014C2FE9F9C6.png" xlink:type="simple" xlink:show="embed" xlink:actuate="onLoad" draw:mime-type="image/png"/></draw:frame><draw:frame draw:style-name="fr1" draw:name="Image21" text:anchor-type="char" svg:x="-0.57cm" svg:y="8.641cm" svg:width="17.59cm" svg:height="14.573cm" draw:z-index="19"><draw:image xlink:href="Pictures/100000000000034E000002BDB7522921.png" xlink:type="simple" xlink:show="embed" xlink:actuate="onLoad" draw:mime-type="image/png"/></draw:frame></text:p>
      <text:p text:style-name="Standard"><text:soft-page-break/></text:p>
      <text:p text:style-name="P1"/>
      <text:p text:style-name="P7">6) <text:span text:style-name="T12">Comparing Results</text:span></text:p>
      <text:p text:style-name="P7"><text:span text:style-name="T12"/></text:p>
      <text:p text:style-name="P8"><text:s text:c="6"/><text:span text:style-name="T12">Evaluation Metrics</text:span></text:p>
      <text:p text:style-name="P8"><text:s text:c="6"/></text:p>
      <text:p text:style-name="P9"><text:s text:c="4"/>• Accuracy: Overall correctness of predictions.</text:p>
      <text:p text:style-name="P9"><text:s text:c="4"/>• Precision: Proportion of positive predictions that are <text:s/>actually positive.</text:p>
      <text:p text:style-name="P9"><text:s text:c="4"/>• Recall: Proportion of actual positive cases correctly <text:s text:c="7"/>identified.</text:p>
      <text:p text:style-name="P9"><text:s text:c="4"/>• F1-Score: Harmonic mean of precision and recall,</text:p>
      <text:p text:style-name="P9"><text:s text:c="6"/>balancing both. </text:p>
      <text:p text:style-name="P9"><text:s text:c="4"/>• AUC-ROC: Area Under the Receiver Operating Characteristic curve, measuring a model's ability to distinguish between positive and negative classes. </text:p>
      <text:p text:style-name="P8"/>
      <text:p text:style-name="P16"><text:span text:style-name="Strong_20_Emphasis"><text:span text:style-name="T2"><text:s text:c="6"/>6.1) </text:span></text:span><text:span text:style-name="Strong_20_Emphasis"><text:span text:style-name="T3">Logistic Regression</text:span></text:span><text:span text:style-name="T1">:</text:span></text:p>
      <text:list text:style-name="L1">
        <text:list-item>
          <text:p text:style-name="P22"><text:span text:style-name="Strong_20_Emphasis"><text:span text:style-name="T1">Strengths</text:span></text:span><text:span text:style-name="T1">: Decent performance with an AUC-ROC of </text:span><text:span text:style-name="Strong_20_Emphasis"><text:span text:style-name="T1">0.89</text:span></text:span><text:span text:style-name="T1"> and a balanced F1 Score of </text:span><text:span text:style-name="Strong_20_Emphasis"><text:span text:style-name="T1">0.838</text:span></text:span><text:span text:style-name="T1">.</text:span></text:p>
        </text:list-item>
        <text:list-item>
          <text:p text:style-name="P23"><text:span text:style-name="Strong_20_Emphasis"><text:span text:style-name="T1">Weakness</text:span></text:span><text:span text:style-name="T1">: Slightly lower precision compared to Random Forest.</text:span></text:p>
        </text:list-item>
      </text:list>
      <text:p text:style-name="P11"><text:span text:style-name="T14"/></text:p>
      <text:list text:continue-numbering="true" text:style-name="L1">
        <text:list-header>
          <text:p text:style-name="P23"><text:span text:style-name="Strong_20_Emphasis"><text:span text:style-name="T2">6.2) </text:span></text:span><text:span text:style-name="Strong_20_Emphasis"><text:span text:style-name="T3">Decision Tree</text:span></text:span><text:span text:style-name="T3">:</text:span></text:p>
        </text:list-header>
      </text:list>
      <text:list text:style-name="L2">
        <text:list-item>
          <text:p text:style-name="P30"><text:span text:style-name="Strong_20_Emphasis"><text:span text:style-name="T1">Strengths</text:span></text:span><text:span text:style-name="T1">: Interpretable model with reasonable metrics.</text:span></text:p>
        </text:list-item>
        <text:list-item>
          <text:p text:style-name="P29"><text:span text:style-name="Strong_20_Emphasis"><text:span text:style-name="T1">Weakness</text:span></text:span><text:span text:style-name="T1">: Lowest AUC-ROC (</text:span><text:span text:style-name="Strong_20_Emphasis"><text:span text:style-name="T1">0.78</text:span></text:span><text:span text:style-name="T1">) and F1 Score (</text:span><text:span text:style-name="Strong_20_Emphasis"><text:span text:style-name="T1">0.777</text:span></text:span><text:span text:style-name="T1">) among the models, indicating weaker overall performance.</text:span></text:p>
          <text:p text:style-name="P24"><text:span text:style-name="T14"/></text:p>
        </text:list-item>
      </text:list>
      <text:list text:style-name="L3">
        <text:list-header>
          <text:p text:style-name="P31"><text:soft-page-break/><text:span text:style-name="Strong_20_Emphasis"><text:span text:style-name="T2">6.3) </text:span></text:span><text:span text:style-name="Strong_20_Emphasis"><text:span text:style-name="T4">Random Forest</text:span></text:span><text:span text:style-name="T1">:</text:span></text:p>
        </text:list-header>
      </text:list>
      <text:list text:style-name="L4">
        <text:list-item>
          <text:p text:style-name="P33"><text:span text:style-name="Strong_20_Emphasis"><text:span text:style-name="T1">Strengths</text:span></text:span><text:span text:style-name="T1">:</text:span></text:p>
          <text:list>
            <text:list-item>
              <text:p text:style-name="P33"><text:span text:style-name="T1">Best performance in most metrics, with the highest Accuracy (</text:span><text:span text:style-name="Strong_20_Emphasis"><text:span text:style-name="T1">0.876</text:span></text:span><text:span text:style-name="T1">), Precision (</text:span><text:span text:style-name="Strong_20_Emphasis"><text:span text:style-name="T1">0.849</text:span></text:span><text:span text:style-name="T1">), F1 Score (</text:span><text:span text:style-name="Strong_20_Emphasis"><text:span text:style-name="T1">0.879</text:span></text:span><text:span text:style-name="T1">), and AUC-ROC (</text:span><text:span text:style-name="Strong_20_Emphasis"><text:span text:style-name="T1">0.91</text:span></text:span><text:span text:style-name="T1">).</text:span></text:p>
            </text:list-item>
            <text:list-item>
              <text:p text:style-name="P25">Excellent balance between recall and precision.</text:p>
            </text:list-item>
          </text:list>
        </text:list-item>
      </text:list>
      <text:p text:style-name="P27"/>
      <text:list text:continue-numbering="true" text:style-name="L4">
        <text:list-item>
          <text:p text:style-name="P32"><text:span text:style-name="Strong_20_Emphasis"><text:span text:style-name="T1">Weaknes</text:span></text:span><text:span text:style-name="Strong_20_Emphasis"><text:span text:style-name="T2">s</text:span></text:span><text:span text:style-name="T1">: Slightly longer training and prediction times due to its ensemble nature.</text:span></text:p>
        </text:list-item>
      </text:list>
      <text:list text:style-name="L5">
        <text:list-header>
          <text:p text:style-name="P34"><text:span text:style-name="Strong_20_Emphasis"><text:span text:style-name="T2">6.4) </text:span></text:span><text:span text:style-name="Strong_20_Emphasis"><text:span text:style-name="T3">Gradient Boosting</text:span></text:span><text:span text:style-name="T3">:</text:span></text:p>
        </text:list-header>
      </text:list>
      <text:list text:style-name="L6">
        <text:list-item>
          <text:p text:style-name="P36"><text:span text:style-name="Strong_20_Emphasis"><text:span text:style-name="T1">Strengths</text:span></text:span><text:span text:style-name="T1">:</text:span></text:p>
          <text:list>
            <text:list-item>
              <text:p text:style-name="P36"><text:span text:style-name="T1">Competitive performance with Random Forest in Recall (</text:span><text:span text:style-name="Strong_20_Emphasis"><text:span text:style-name="T1">0.811</text:span></text:span><text:span text:style-name="T1">) and AUC-ROC (</text:span><text:span text:style-name="Strong_20_Emphasis"><text:span text:style-name="T1">0.91</text:span></text:span><text:span text:style-name="T1">).</text:span></text:p>
            </text:list-item>
            <text:list-item>
              <text:p text:style-name="P26">Slightly more robust on imbalanced datasets due to boosting methodology.</text:p>
              <text:p text:style-name="P26"/>
            </text:list-item>
          </text:list>
        </text:list-item>
        <text:list-item>
          <text:p text:style-name="P35"><text:span text:style-name="Strong_20_Emphasis"><text:span text:style-name="T1">Weakness</text:span></text:span><text:span text:style-name="T1">: Lower F1 Score (</text:span><text:span text:style-name="Strong_20_Emphasis"><text:span text:style-name="T1">0.853</text:span></text:span><text:span text:style-name="T1">) compared to Random Forest, making it slightly less favorable overall.</text:span></text:p>
        </text:list-item>
      </text:list>
      <text:h text:style-name="Heading_20_3" text:outline-level="3"><text:span text:style-name="Strong_20_Emphasis"><text:span text:style-name="T7">Selection Criteria:</text:span></text:span></text:h>
      <text:list text:style-name="L7">
        <text:list-item>
          <text:p text:style-name="P38"><text:span text:style-name="Strong_20_Emphasis"><text:span text:style-name="T5">Overall Best Model</text:span></text:span><text:span text:style-name="T6">: </text:span><text:span text:style-name="Strong_20_Emphasis"><text:span text:style-name="T1">Random Forest</text:span></text:span><text:span text:style-name="T6"> is the most suitable model for this task due to its consistently high metrics, including accuracy, precision, recall, F1 Score, AUC-ROC.</text:span></text:p>
          <text:p text:style-name="P28"><text:span text:style-name="T13"/></text:p>
        </text:list-item>
        <text:list-item>
          <text:p text:style-name="P37"><text:span text:style-name="Strong_20_Emphasis"><text:span text:style-name="T5">Alternative Model</text:span></text:span><text:span text:style-name="T6">: </text:span><text:span text:style-name="Strong_20_Emphasis"><text:span text:style-name="T1">Gradient Boosting</text:span></text:span><text:span text:style-name="T6"> can be considered if the goal is to explore more robust ensemble techniques or prioritize slightly better recall.</text:span></text:p>
        </text:list-item>
      </text:list>
      <text:p text:style-name="P5"><text:soft-page-break/></text:p>
      <text:p text:style-name="P12">Conclusion : </text:p>
      <text:p text:style-name="P10"/>
      <text:list text:style-name="L8">
        <text:list-item>
          <text:p text:style-name="P19"><text:span text:style-name="T11">Random Forest</text:span> can be used as the primary model for loan default prediction.</text:p>
          <text:p text:style-name="P19"/>
        </text:list-item>
        <text:list-item>
          <text:p text:style-name="P18"><text:span text:style-name="T9">We </text:span><text:span text:style-name="T10">can p</text:span><text:span text:style-name="T8">erform hyperparameter tuning for Random Forest to further improve performance.</text:span></text:p>
          <text:p text:style-name="P20">link:https://colab.research.google.com/drive/1SQ28_F96XRDRr45ROcEGjbccC95Iyz88#scrollTo=CxXRFgU_CXm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3:11:18.295704071</meta:creation-date>
    <meta:generator>LibreOffice/24.2.6.2$Linux_X86_64 LibreOffice_project/420$Build-2</meta:generator>
    <dc:date>2024-12-12T00:26:42.831983785</dc:date>
    <meta:editing-duration>PT1H41M51S</meta:editing-duration>
    <meta:editing-cycles>9</meta:editing-cycles>
    <meta:document-statistic meta:table-count="0" meta:image-count="21" meta:object-count="0" meta:page-count="14" meta:paragraph-count="55" meta:word-count="353" meta:character-count="2476" meta:non-whitespace-character-count="2141"/>
  </office:meta>
</office:document-meta>
</file>